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rebuchet MS" svg:font-family="'Trebuchet MS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666666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ubtitle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Standard">
      <style:paragraph-properties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line-height="115%" style:writing-mode="lr-tb"/>
      <style:text-properties fo:color="#666666"/>
    </style:style>
    <style:style style:name="P10" style:family="paragraph" style:parent-style-name="Standard">
      <style:paragraph-properties fo:margin-left="0.042cm" fo:margin-right="0cm" fo:text-indent="-0.021cm" style:auto-text-indent="false">
        <style:tab-stops/>
      </style:paragraph-properties>
    </style:style>
    <style:style style:name="P11" style:family="paragraph" style:parent-style-name="Standard">
      <style:paragraph-properties fo:margin-left="0.042cm" fo:margin-right="0cm" fo:text-indent="-0.021cm" style:auto-text-indent="false">
        <style:tab-stops/>
      </style:paragraph-properties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.042cm" fo:margin-right="0cm" fo:text-indent="-0.021cm" style:auto-text-indent="false">
        <style:tab-stops/>
      </style:paragraph-properties>
      <style:text-properties fo:color="#000000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.042cm" fo:margin-right="0cm" fo:text-indent="-0.021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margin-left="0.042cm" fo:margin-right="0cm" fo:text-indent="-0.021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top="0.353cm" fo:margin-bottom="0cm" fo:line-height="90%"/>
      <style:text-properties fo:color="#000000" style:font-name="Arial" fo:font-size="11pt" style:font-size-asian="11pt" style:font-size-complex="11pt"/>
    </style:style>
    <style:style style:name="P18" style:family="paragraph" style:parent-style-name="Standard">
      <style:paragraph-properties fo:margin-top="0.176cm" fo:margin-bottom="0cm" fo:line-height="90%"/>
      <style:text-properties fo:color="#000000" style:font-name="Arial" fo:font-size="11pt" style:font-size-asian="11pt" style:font-size-complex="11pt"/>
    </style:style>
    <style:style style:name="P19" style:family="paragraph" style:parent-style-name="Standard">
      <style:paragraph-properties fo:line-height="115%" fo:break-before="auto" fo:break-after="auto" style:writing-mode="lr-tb"/>
    </style:style>
    <style:style style:name="P20" style:family="paragraph" style:parent-style-name="Standard">
      <style:paragraph-properties fo:line-height="115%" style:writing-mode="lr-tb"/>
    </style:style>
    <style:style style:name="P21" style:family="paragraph" style:parent-style-name="Heading_20_1">
      <style:paragraph-properties fo:line-height="115%" fo:break-before="auto" fo:break-after="auto" style:writing-mode="lr-tb"/>
    </style:style>
    <style:style style:name="P22" style:family="paragraph" style:parent-style-name="Heading_20_1">
      <style:paragraph-properties fo:line-height="115%" style:writing-mode="lr-tb"/>
    </style:style>
    <style:style style:name="P23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</style:style>
    <style:style style:name="P24" style:family="paragraph" style:parent-style-name="Heading_20_2"/>
    <style:style style:name="P25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P26" style:family="paragraph" style:parent-style-name="Title">
      <style:paragraph-properties fo:line-height="115%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666666"/>
    </style:style>
    <style:style style:name="T3" style:family="text">
      <style:text-properties fo:color="#000000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ace States &amp; Live Race Specification</text:p>
      <text:p text:style-name="P4"><text:bookmark text:name="h.y49zl72zg9od"/><text:a xlink:type="simple" xlink:href="https://bugzilla.sapsailing.com/bugzilla/show_bug.cgi?id=3011">Issue</text:a><text:a xlink:type="simple" xlink:href="https://bugzilla.sapsailing.com/bugzilla/show_bug.cgi?id=3720"> 3720</text:a></text:p>
      <text:h text:style-name="P21" text:outline-level="10">General purpose</text:h>
      <text:h text:style-name="P10" text:outline-level="10">We have many places where the 'state' or 'progress' of a race is shown or used to show or hide elements on our website. </text:h>
      <text:h text:style-name="P10" text:outline-level="10"/>
      <text:h text:style-name="P10" text:outline-level="10">Samples are:</text:h>
      <text:h text:style-name="P10" text:outline-level="10">- Spectator.html (legacy)</text:h>
      <text:h text:style-name="P10" text:outline-level="10">- Home.html (e.g. live races boy, races list)</text:h>
      <text:h text:style-name="P10" text:outline-level="10">- RegattaoOverview.html</text:h>
      <text:h text:style-name="P10" text:outline-level="10">- Race Manager App</text:h>
      <text:h text:style-name="P10" text:outline-level="10"/>
      <text:h text:style-name="P10" text:outline-level="10">Over time different ways to calculate this state has been used causing inconsistent views of the same information in different places.</text:h>
      <text:h text:style-name="P10" text:outline-level="10"/>
      <text:h text:style-name="P10" text:outline-level="10">This specification is intended to define the different view states of a race including the important 'live' state. A testable implementation should be derived from the specification which should be used consistently in all places.</text:h>
      <text:h text:style-name="P10" text:outline-level="10"/>
      <text:h text:style-name="P22" text:outline-level="10">Race states</text:h>
      <text:p text:style-name="P1"/>
      <text:p text:style-name="P7">In our code base we have different enum types defining some race states for different purposes.</text:p>
      <text:p text:style-name="P7"/>
      <text:p text:style-name="P8"><text:span text:style-name="T6">package</text:span><text:span text:style-name="T3"> com.sap.sailing.domain.common.racelog;</text:span></text:p>
      <text:p text:style-name="P8"><text:span text:style-name="T6">public</text:span><text:span text:style-name="T3"> </text:span><text:span text:style-name="T6">enum</text:span><text:span text:style-name="T3"> RaceLogRaceStatus {</text:span></text:p>
      <text:p text:style-name="P5"><text:span text:style-name="T4"><text:tab/></text:span><text:span text:style-name="T8">UNKNOWN</text:span><text:span text:style-name="T3">(0), </text:span><text:span text:style-name="T8">UNSCHEDULED</text:span><text:span text:style-name="T3">(1), </text:span><text:span text:style-name="T8">PRESCHEDULED</text:span><text:span text:style-name="T3">(2), </text:span><text:span text:style-name="T8">SCHEDULED</text:span><text:span text:style-name="T3">(3), </text:span><text:span text:style-name="T8">STARTPHASE</text:span><text:span text:style-name="T3">(4), </text:span><text:span text:style-name="T8">RUNNING</text:span><text:span text:style-name="T3">(5), <text:tab/></text:span><text:span text:style-name="T8">FINISHING</text:span><text:span text:style-name="T3">(6), </text:span><text:span text:style-name="T8">FINISHED</text:span><text:span text:style-name="T3">(7);</text:span></text:p>
      <text:p text:style-name="P7">}</text:p>
      <text:p text:style-name="P7"/>
      <text:p text:style-name="P7"/>
      <text:p text:style-name="P3"><text:span text:style-name="T6">package</text:span><text:span text:style-name="T3"> com.sap.sailing.domain.common;</text:span></text:p>
      <text:p text:style-name="P5"><text:span text:style-name="T6">public</text:span><text:span text:style-name="T3"> </text:span><text:span text:style-name="T6">enum</text:span><text:span text:style-name="T3"> TrackedRaceStatusEnum { </text:span><text:span text:style-name="T8">PREPARED</text:span><text:span text:style-name="T3">(0), </text:span><text:span text:style-name="T8">LOADING</text:span><text:span text:style-name="T3">(1), </text:span><text:span text:style-name="T8">TRACKING</text:span><text:span text:style-name="T3">(2), </text:span><text:span text:style-name="T8">FINISHED</text:span><text:span text:style-name="T3">(3), <text:tab/></text:span><text:span text:style-name="T8">ERROR</text:span><text:span text:style-name="T3">(4);</text:span></text:p>
      <text:p text:style-name="P6">}</text:p>
      <text:p text:style-name="P9"/>
      <text:h text:style-name="P10" text:outline-level="10">These race states are transfered to the client via </text:h>
      <text:h text:style-name="P10" text:outline-level="10"/>
      <text:h text:style-name="P11" text:outline-level="10"><text:span text:style-name="T6">package</text:span><text:span text:style-name="T3"> com.sap.sailing.gwt.home.communication.race;</text:span></text:h>
      <text:h text:style-name="P10" text:outline-level="10"/>
      <text:h text:style-name="P11" text:outline-level="10"><text:span text:style-name="T6">public</text:span><text:span text:style-name="T3"> </text:span><text:span text:style-name="T6">class</text:span><text:span text:style-name="T3"> SimpleRaceMetadataDTO </text:span><text:span text:style-name="T6">implements</text:span><text:span text:style-name="T3"> DTO, Comparable&lt;SimpleRaceMetadataDTO&gt; {</text:span></text:h>
      <text:h text:style-name="P15" text:outline-level="10"><text:span text:style-name="T3"><text:s text:c="4"/></text:span><text:span text:style-name="T6">public</text:span><text:span text:style-name="T3"> </text:span><text:span text:style-name="T6">enum</text:span><text:span text:style-name="T3"> RaceViewState {...}</text:span></text:h>
      <text:h text:style-name="P10" text:outline-level="10"><text:span text:style-name="T5"><text:s text:c="4"/></text:span><text:span text:style-name="T7">public</text:span><text:span text:style-name="T5"> </text:span><text:span text:style-name="T7">enum</text:span><text:span text:style-name="T5"> RaceTrackingState {…}</text:span></text:h>
      <text:h text:style-name="P12" text:outline-level="10">}</text:h>
      <text:h text:style-name="P12" text:outline-level="10"/>
      <text:h text:style-name="P12" text:outline-level="10"/>
      <text:h text:style-name="P12" text:outline-level="10"/>
      <text:h text:style-name="P12" text:outline-level="10"/>
      <text:h text:style-name="P12" text:outline-level="10"/>
      <text:h text:style-name="P12" text:outline-level="10"/>
      <text:h text:style-name="P12" text:outline-level="10"/>
      <text:h text:style-name="P10" text:outline-level="10"><text:soft-page-break/>Just found one more state: RaceLiveState … is this used?</text:h>
      <text:h text:style-name="P12" text:outline-level="10"/>
      <text:h text:style-name="P12" text:outline-level="10"><text:span text:style-name="T6">package</text:span> com.sap.sailing.domain.common.dto;</text:h>
      <text:h text:style-name="P12" text:outline-level="10"/>
      <text:h text:style-name="P12" text:outline-level="10"><text:span text:style-name="T6">public</text:span> <text:span text:style-name="T6">class</text:span> RaceDTO <text:span text:style-name="T6">extends</text:span> BasicRaceDTO {</text:h>
      <text:h text:style-name="P15" text:outline-level="10"><text:span text:style-name="T3"><text:s text:c="4"/></text:span><text:span text:style-name="T6">public</text:span><text:span text:style-name="T3"> </text:span><text:span text:style-name="T6">enum</text:span><text:span text:style-name="T3"> RaceLiveState { </text:span><text:span text:style-name="T8">NOT_TRACKED</text:span><text:span text:style-name="T3">, </text:span><text:span text:style-name="T8">TRACKED</text:span><text:span text:style-name="T3">, </text:span><text:span text:style-name="T8">TRACKED_AND_LIVE</text:span><text:span text:style-name="T3">, <text:tab/></text:span><text:span text:style-name="T8">TRACKED_BUT_NOT_SCHEDULED</text:span><text:span text:style-name="T3"> };</text:span></text:h>
      <text:h text:style-name="P16" text:outline-level="10">}</text:h>
      <text:h text:style-name="P23" text:outline-level="10"><text:line-break/>Derived states</text:h>
      <text:h text:style-name="P10" text:outline-level="10"/>
      <text:h text:style-name="P10" text:outline-level="10">Some display states are derived from the race states adding some more criteria like special time ranges or flags used.</text:h>
      <text:h text:style-name="P10" text:outline-level="10"/>
      <text:h text:style-name="Heading_20_2" text:outline-level="10">State 'isLive'</text:h>
      <text:h text:style-name="P13" text:outline-level="10"/>
      <text:h text:style-name="P13" text:outline-level="10">The state 'isLive' means a race which is currently going on. This comprises also some time before the actual race start as well as time after the last boat has passed the finish time. </text:h>
      <text:h text:style-name="P13" text:outline-level="10"/>
      <text:h text:style-name="P13" text:outline-level="10">Server side</text:h>
      <text:h text:style-name="P13" text:outline-level="10">- defined in TrackedRace.isLive(Timepoint at)</text:h>
      <text:h text:style-name="P13" text:outline-level="10"/>
      <text:h text:style-name="P13" text:outline-level="10">Client side</text:h>
      <text:h text:style-name="P14" text:outline-level="10">- defined in <text:span text:style-name="T3">RaceDTO.isLive(long serverTimePointAsMillis)</text:span></text:h>
      <text:h text:style-name="P13" text:outline-level="10">- has similar logic like the server side isLive(), but needs the server clock time to determine the state</text:h>
      <text:h text:style-name="P13" text:outline-level="10">- the serverTimePoint for the ‚isLive‘ test is the current client time minus the known ‚delay to live‘ plus the time difference between the client and the server<text:line-break/> (see com.sap.sse.gwt.client.player.Timer. getLiveTimePointInMillis())</text:h>
      <text:h text:style-name="P14" text:outline-level="10"><text:span text:style-name="T3">The way</text:span><text:span text:style-name="T3"> </text:span><text:span text:style-name="T3">the</text:span><text:span text:style-name="T3"> </text:span><text:span text:style-name="T3">difference</text:span><text:span text:style-name="T3"> </text:span><text:span text:style-name="T3">between</text:span><text:span text:style-name="T3"> </text:span><text:span text:style-name="T3">client</text:span><text:span text:style-name="T3"> </text:span><text:span text:style-name="T3">and</text:span><text:span text:style-name="T3"> </text:span><text:span text:style-name="T3">server</text:span><text:span text:style-name="T3"> </text:span><text:span text:style-name="T3">time is</text:span><text:span text:style-name="T3"> </text:span><text:span text:style-name="T3">handled</text:span><text:span text:style-name="T3"> </text:span><text:span text:style-name="T3">is</text:span><text:span text:style-name="T3"> </text:span><text:span text:style-name="T3">described</text:span><text:span text:style-name="T3"> </text:span><text:span text:style-name="T3">in com.sap.sse.gwt.client.player.Timer.millisecondsClientIsBehindServer</text:span> </text:h>
      <text:h text:style-name="P14" text:outline-level="10"/>
      <text:h text:style-name="Heading_20_2" text:outline-level="10">State 'isOfPublicInterest'</text:h>
      <text:h text:style-name="P14" text:outline-level="10"/>
      <text:h text:style-name="P14" text:outline-level="10">The state 'isOfPublicInterest' means a race which is of interest for visitors and fans. This covers for sure races in 'live' state, but also e.g. the first scheduled race of a day or a race which has just been canceled or postponed. Currently the 'live now' list of sapsailing.com is using this state.</text:h>
      <text:h text:style-name="P14" text:outline-level="10"/>
      <text:h text:style-name="P14" text:outline-level="10">See... RaceContext.<text:span text:style-name="T5">isLiveOrOfPublicInterest()</text:span></text:h>
      <text:h text:style-name="P14" text:outline-level="10"/>
      <text:h text:style-name="P13" text:outline-level="10">- List of all races with state ‚live‘</text:h>
      <text:h text:style-name="P17" text:outline-level="10">- Additionally races with special flag states of interest (Generall recall, Postponed races, Abandoned races)</text:h>
      <text:h text:style-name="P18" text:outline-level="10"/>
      <text:h text:style-name="P10" text:outline-level="10"><text:span text:style-name="T2"/></text:h>
      <text:p text:style-name="P1"/>
      <text:p text:style-name="P7"/>
      <text:p text:style-name="P7"/>
      <text:p text:style-name="P7"/>
      <text:p text:style-name="P7"/>
      <text:p text:style-name="P25">State Specifications</text:p>
      <text:p text:style-name="Standard"/>
      <text:p text:style-name="Standard">tbd.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rebuchet MS" svg:font-family="'Trebuchet MS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1.905cm"/>
      </text:list-level-style-bullet>
      <text:list-level-style-bullet text:level="2" text:style-name="List1Level1" text:bullet-char="○">
        <style:list-level-properties text:space-before="1.905cm" text:min-label-width="1.905cm"/>
      </text:list-level-style-bullet>
      <text:list-level-style-bullet text:level="3" text:style-name="List1Level2" text:bullet-char="■">
        <style:list-level-properties text:space-before="3.492cm" text:min-label-width="1.588cm"/>
      </text:list-level-style-bullet>
      <text:list-level-style-bullet text:level="4" text:style-name="List1Level3" text:bullet-char="●">
        <style:list-level-properties text:space-before="4.445cm" text:min-label-width="1.905cm"/>
      </text:list-level-style-bullet>
      <text:list-level-style-bullet text:level="5" text:style-name="List1Level4" text:bullet-char="○">
        <style:list-level-properties text:space-before="5.715cm" text:min-label-width="1.905cm"/>
      </text:list-level-style-bullet>
      <text:list-level-style-bullet text:level="6" text:style-name="List1Level5" text:bullet-char="■">
        <style:list-level-properties text:space-before="7.302cm" text:min-label-width="1.588cm"/>
      </text:list-level-style-bullet>
      <text:list-level-style-bullet text:level="7" text:style-name="List1Level6" text:bullet-char="●">
        <style:list-level-properties text:space-before="8.255cm" text:min-label-width="1.905cm"/>
      </text:list-level-style-bullet>
      <text:list-level-style-bullet text:level="8" text:style-name="List1Level7" text:bullet-char="○">
        <style:list-level-properties text:space-before="9.525cm" text:min-label-width="1.905cm"/>
      </text:list-level-style-bullet>
      <text:list-level-style-bullet text:level="9" text:style-name="List1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9cm" fo:margin-bottom="1.54cm" fo:margin-left="1.54cm" fo:margin-right="1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title/>
    <meta:initial-creator/>
    <meta:editing-cycles>23</meta:editing-cycles>
    <dc:date>2016-06-22T20:41:58.45</dc:date>
    <meta:editing-duration>PT1H40M45S</meta:editing-duration>
    <meta:document-statistic meta:table-count="0" meta:image-count="0" meta:object-count="0" meta:page-count="3" meta:paragraph-count="49" meta:word-count="429" meta:character-count="3092" meta:non-whitespace-character-count="2690"/>
  </office:meta>
</office:document-meta>
</file>