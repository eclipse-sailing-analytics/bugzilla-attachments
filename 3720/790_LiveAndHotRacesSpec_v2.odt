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egoe UI1" svg:font-family="'Segoe UI'" style:font-family-generic="swiss"/>
    <style:font-face style:name="Consolas" svg:font-family="Consolas"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margin-left="0.042cm" fo:margin-right="0cm" fo:text-indent="-0.021cm" style:auto-text-indent="false">
        <style:tab-stops/>
      </style:paragraph-properties>
    </style:style>
    <style:style style:name="P2" style:family="paragraph" style:parent-style-name="Standard">
      <style:paragraph-properties fo:margin-left="0.042cm" fo:margin-right="0cm" fo:text-indent="-0.021cm" style:auto-text-indent="false">
        <style:tab-stops/>
      </style:paragraph-properties>
      <style:text-properties style:font-name="Consolas" fo:font-size="10pt" style:font-name-asian="Consolas" style:font-size-asian="10pt" style:font-name-complex="Consolas" style:font-size-complex="10pt"/>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style:font-name="Consolas" fo:font-size="10pt" style:font-name-asian="Consolas" style:font-size-asian="10pt" style:font-name-complex="Consolas" style:font-size-complex="10pt"/>
    </style:style>
    <style:style style:name="P5" style:family="paragraph" style:parent-style-name="Standard">
      <style:text-properties fo:color="#666666"/>
    </style:style>
    <style:style style:name="P6" style:family="paragraph" style:parent-style-name="Standard">
      <style:paragraph-properties fo:margin-top="0.353cm" fo:margin-bottom="0cm" fo:line-height="90%"/>
    </style:style>
    <style:style style:name="P7" style:family="paragraph" style:parent-style-name="Standard">
      <style:paragraph-properties fo:margin-top="0.176cm" fo:margin-bottom="0cm" fo:line-height="90%"/>
    </style:style>
    <style:style style:name="P8" style:family="paragraph" style:parent-style-name="Standard">
      <style:paragraph-properties fo:margin-left="0.021cm" fo:margin-right="0cm" fo:text-indent="0cm" style:auto-text-indent="false">
        <style:tab-stops/>
      </style:paragraph-properties>
      <style:text-properties style:font-name="Consolas" fo:font-size="10pt" style:font-name-asian="Consolas" style:font-size-asian="10pt" style:font-name-complex="Consolas" style:font-size-complex="10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Heading_20_1" style:list-style-name="">
      <style:paragraph-properties fo:line-height="115%" fo:keep-together="always" fo:hyphenation-ladder-count="no-limit"/>
      <style:text-properties fo:hyphenate="false"/>
    </style:style>
    <style:style style:name="P18" style:family="paragraph" style:parent-style-name="Heading_20_1">
      <style:paragraph-properties fo:break-before="page"/>
    </style:style>
    <style:style style:name="P19" style:family="paragraph" style:parent-style-name="Title" style:master-page-name="MP0">
      <style:paragraph-properties style:page-number="auto" fo:break-before="page"/>
    </style:style>
    <style:style style:name="P20" style:family="paragraph" style:parent-style-name="Title" style:master-page-name="MP2">
      <style:paragraph-properties style:page-number="auto" fo:break-before="page"/>
    </style:style>
    <style:style style:name="T1"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 style:family="text">
      <style:text-properties style:font-name="Consolas" fo:font-size="10pt" style:font-name-asian="Consolas" style:font-size-asian="10pt" style:font-name-complex="Consolas" style:font-size-complex="10pt"/>
    </style:style>
    <style:style style:name="T3" style:family="text">
      <style:text-properties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4"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5" style:family="text">
      <style:text-properties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ace States &amp; Live Race Specification</text:p>
      <text:p text:style-name="Subtitle"><text:bookmark text:name="h.y49zl72zg9od"/><text:a xlink:type="simple" xlink:href="https://bugzilla.sapsailing.com/bugzilla/show_bug.cgi?id=3011" office:target-frame-name="_top" xlink:show="replace">Issue</text:a><text:a xlink:type="simple" xlink:href="https://bugzilla.sapsailing.com/bugzilla/show_bug.cgi?id=3720" office:target-frame-name="_top" xlink:show="replace"> 3720</text:a></text:p>
      <text:h text:style-name="Heading_20_1" text:outline-level="1">General purpose</text:h>
      <text:p text:style-name="P1">We have many places where the 'state' or 'progress' of a race is shown or used to show or hide elements on our website.</text:p>
      <text:p text:style-name="P1"/>
      <text:p text:style-name="P1">Samples are:</text:p>
      <text:p text:style-name="P1">- Spectator.html (legacy)</text:p>
      <text:p text:style-name="P1">- Home.html (e.g. live races box, races list)</text:p>
      <text:p text:style-name="P1">- RaceBoard.html (whether a race is shown as live with “Back to Live” or in replay)</text:p>
      <text:p text:style-name="P1">- RegattaOverview.html</text:p>
      <text:p text:style-name="P1">- Race Manager App</text:p>
      <text:p text:style-name="P1"/>
      <text:p text:style-name="P1">Over time different ways to calculate this state have been used causing inconsistent views of the same information in different places.</text:p>
      <text:p text:style-name="P1"/>
      <text:p text:style-name="P1">This specification is intended to define the different view states of a race including the important 'live' state. A testable implementation should be derived from the specification which should be used consistently in all places.</text:p>
      <text:p text:style-name="P1"/>
      <text:h text:style-name="Heading_20_1" text:outline-level="1">Race states</text:h>
      <text:p text:style-name="Standard"/>
      <text:p text:style-name="Standard">In our code base we have different enum types defining some race states for different purposes.</text:p>
      <text:p text:style-name="Standard"/>
      <text:p text:style-name="Standard"><text:span text:style-name="Default_20_Paragraph_20_Font"><text:span text:style-name="T1">package</text:span></text:span><text:span text:style-name="Default_20_Paragraph_20_Font"><text:span text:style-name="T2"> com.sap.sailing.domain.common.racelog;</text:span></text:span></text:p>
      <text:p text:style-name="Standard"><text:span text:style-name="Default_20_Paragraph_20_Font"><text:span text:style-name="T1">public</text:span></text:span><text:span text:style-name="Default_20_Paragraph_20_Font"><text:span text:style-name="T2"> </text:span></text:span><text:span text:style-name="Default_20_Paragraph_20_Font"><text:span text:style-name="T1">enum</text:span></text:span><text:span text:style-name="Default_20_Paragraph_20_Font"><text:span text:style-name="T2"> RaceLogRaceStatus {</text:span></text:span></text:p>
      <text:p text:style-name="P3"><text:span text:style-name="Default_20_Paragraph_20_Font"><text:span text:style-name="T3"><text:tab/></text:span></text:span><text:span text:style-name="Default_20_Paragraph_20_Font"><text:span text:style-name="T4">UNKNOWN</text:span></text:span><text:span text:style-name="Default_20_Paragraph_20_Font"><text:span text:style-name="T2">(0), </text:span></text:span><text:span text:style-name="Default_20_Paragraph_20_Font"><text:span text:style-name="T4">UNSCHEDULED</text:span></text:span><text:span text:style-name="Default_20_Paragraph_20_Font"><text:span text:style-name="T2">(1), </text:span></text:span><text:span text:style-name="Default_20_Paragraph_20_Font"><text:span text:style-name="T4">PRESCHEDULED</text:span></text:span><text:span text:style-name="Default_20_Paragraph_20_Font"><text:span text:style-name="T2">(2), </text:span></text:span><text:span text:style-name="Default_20_Paragraph_20_Font"><text:span text:style-name="T4">SCHEDULED</text:span></text:span><text:span text:style-name="Default_20_Paragraph_20_Font"><text:span text:style-name="T2">(3), </text:span></text:span><text:span text:style-name="Default_20_Paragraph_20_Font"><text:span text:style-name="T4">STARTPHASE</text:span></text:span><text:span text:style-name="Default_20_Paragraph_20_Font"><text:span text:style-name="T2">(4), </text:span></text:span><text:span text:style-name="Default_20_Paragraph_20_Font"><text:span text:style-name="T4">RUNNING</text:span></text:span><text:span text:style-name="Default_20_Paragraph_20_Font"><text:span text:style-name="T2">(5), </text:span></text:span><text:span text:style-name="Default_20_Paragraph_20_Font"><text:span text:style-name="T2"><text:tab/></text:span></text:span><text:span text:style-name="Default_20_Paragraph_20_Font"><text:span text:style-name="T4">FINISHING</text:span></text:span><text:span text:style-name="Default_20_Paragraph_20_Font"><text:span text:style-name="T2">(6), </text:span></text:span><text:span text:style-name="Default_20_Paragraph_20_Font"><text:span text:style-name="T4">FINISHED</text:span></text:span><text:span text:style-name="Default_20_Paragraph_20_Font"><text:span text:style-name="T2">(7);</text:span></text:span></text:p>
      <text:p text:style-name="Standard">}</text:p>
      <text:p text:style-name="Standard"/>
      <text:p text:style-name="Standard"/>
      <text:p text:style-name="Standard"><text:span text:style-name="Default_20_Paragraph_20_Font"><text:span text:style-name="T1">package</text:span></text:span><text:span text:style-name="Default_20_Paragraph_20_Font"><text:span text:style-name="T2"> com.sap.sailing.domain.common;</text:span></text:span></text:p>
      <text:p text:style-name="P3"><text:span text:style-name="Default_20_Paragraph_20_Font"><text:span text:style-name="T1">public</text:span></text:span><text:span text:style-name="Default_20_Paragraph_20_Font"><text:span text:style-name="T2"> </text:span></text:span><text:span text:style-name="Default_20_Paragraph_20_Font"><text:span text:style-name="T1">enum</text:span></text:span><text:span text:style-name="Default_20_Paragraph_20_Font"><text:span text:style-name="T2"> TrackedRaceStatusEnum { </text:span></text:span><text:span text:style-name="Default_20_Paragraph_20_Font"><text:span text:style-name="T4">PREPARED</text:span></text:span><text:span text:style-name="Default_20_Paragraph_20_Font"><text:span text:style-name="T2">(0), </text:span></text:span><text:span text:style-name="Default_20_Paragraph_20_Font"><text:span text:style-name="T4">LOADING</text:span></text:span><text:span text:style-name="Default_20_Paragraph_20_Font"><text:span text:style-name="T2">(1), </text:span></text:span><text:span text:style-name="Default_20_Paragraph_20_Font"><text:span text:style-name="T4">TRACKING</text:span></text:span><text:span text:style-name="Default_20_Paragraph_20_Font"><text:span text:style-name="T2">(2), </text:span></text:span><text:span text:style-name="Default_20_Paragraph_20_Font"><text:span text:style-name="T4">FINISHED</text:span></text:span><text:span text:style-name="Default_20_Paragraph_20_Font"><text:span text:style-name="T2">(3), </text:span></text:span><text:span text:style-name="Default_20_Paragraph_20_Font"><text:span text:style-name="T2"><text:tab/></text:span></text:span><text:span text:style-name="Default_20_Paragraph_20_Font"><text:span text:style-name="T4">ERROR</text:span></text:span><text:span text:style-name="Default_20_Paragraph_20_Font"><text:span text:style-name="T2">(4);</text:span></text:span></text:p>
      <text:p text:style-name="P4">}</text:p>
      <text:p text:style-name="P5"/>
      <text:p text:style-name="P1">These race states are transferred to the client via</text:p>
      <text:p text:style-name="P1"/>
      <text:p text:style-name="P1"><text:span text:style-name="Default_20_Paragraph_20_Font"><text:span text:style-name="T1">package</text:span></text:span><text:span text:style-name="Default_20_Paragraph_20_Font"><text:span text:style-name="T2"> com.sap.sailing.gwt.home.communication.race;</text:span></text:span></text:p>
      <text:p text:style-name="P1"/>
      <text:p text:style-name="P1"><text:span text:style-name="Default_20_Paragraph_20_Font"><text:span text:style-name="T1">public</text:span></text:span><text:span text:style-name="Default_20_Paragraph_20_Font"><text:span text:style-name="T2"> </text:span></text:span><text:span text:style-name="Default_20_Paragraph_20_Font"><text:span text:style-name="T1">class</text:span></text:span><text:span text:style-name="Default_20_Paragraph_20_Font"><text:span text:style-name="T2"> SimpleRaceMetadataDTO </text:span></text:span><text:span text:style-name="Default_20_Paragraph_20_Font"><text:span text:style-name="T1">implements</text:span></text:span><text:span text:style-name="Default_20_Paragraph_20_Font"><text:span text:style-name="T2"> DTO, Comparable&lt;SimpleRaceMetadataDTO&gt; {</text:span></text:span></text:p>
      <text:p text:style-name="P3"><text:span text:style-name="Default_20_Paragraph_20_Font"><text:span text:style-name="T2"><text:s text:c="4"/></text:span></text:span><text:span text:style-name="Default_20_Paragraph_20_Font"><text:span text:style-name="T1">public</text:span></text:span><text:span text:style-name="Default_20_Paragraph_20_Font"><text:span text:style-name="T2"> </text:span></text:span><text:span text:style-name="Default_20_Paragraph_20_Font"><text:span text:style-name="T1">enum</text:span></text:span><text:span text:style-name="Default_20_Paragraph_20_Font"><text:span text:style-name="T2"> RaceViewState {...}</text:span></text:span></text:p>
      <text:p text:style-name="P1"><text:span text:style-name="Default_20_Paragraph_20_Font"><text:span text:style-name="T2"><text:s text:c="4"/></text:span></text:span><text:span text:style-name="Default_20_Paragraph_20_Font"><text:span text:style-name="T1">public</text:span></text:span><text:span text:style-name="Default_20_Paragraph_20_Font"><text:span text:style-name="T2"> </text:span></text:span><text:span text:style-name="Default_20_Paragraph_20_Font"><text:span text:style-name="T1">enum</text:span></text:span><text:span text:style-name="Default_20_Paragraph_20_Font"><text:span text:style-name="T2"> RaceTrackingState {…}</text:span></text:span></text:p>
      <text:p text:style-name="P2">}</text:p>
      <text:p text:style-name="P2"/>
      <text:p text:style-name="P1">Furthermore, as used by LeaderboardGroupPanel, the panel that renders the contents of the Spectator.html entry point, there is RaceDolumnDTO.isLive(Fleet, long) which in turn delegates to BasicRaceDTO.isLive(long) which has its own sophisticated implementation.</text:p>
      <text:p text:style-name="P1"><text:soft-page-break/>RaceTimePanel.isLiveModeToBeMadePossible() is the implementation that decides for the RaceBoard.html entry point whether the user can put the timer into live mode.</text:p>
      <text:p text:style-name="P2"/>
      <text:p text:style-name="P2"/>
      <text:p text:style-name="P2"/>
      <text:p text:style-name="P8"/>
      <text:p text:style-name="P2"/>
      <text:p text:style-name="P1">Just found one more state: RaceLiveState … is this used? No, it does’t seem so on the <text:span text:style-name="Default_20_Paragraph_20_Font"><text:span text:style-name="T5">master</text:span></text:span> branch. I’ve deleted it, together with RaceDTO.getLiveState(long). See commit b26b998866f0a9af347beb0e8afe216f1e172743.</text:p>
      <text:p text:style-name="P2"/>
      <text:p text:style-name="P1"><text:span text:style-name="Default_20_Paragraph_20_Font"><text:span text:style-name="T1">package</text:span></text:span><text:span text:style-name="Default_20_Paragraph_20_Font"><text:span text:style-name="T2"> </text:span></text:span><text:span text:style-name="Default_20_Paragraph_20_Font"><text:span text:style-name="T2">com.sap.sailing.domain.common.dto;</text:span></text:span></text:p>
      <text:p text:style-name="P2"/>
      <text:p text:style-name="P1"><text:span text:style-name="Default_20_Paragraph_20_Font"><text:span text:style-name="T1">public</text:span></text:span><text:span text:style-name="Default_20_Paragraph_20_Font"><text:span text:style-name="T2"> </text:span></text:span><text:span text:style-name="Default_20_Paragraph_20_Font"><text:span text:style-name="T1">class</text:span></text:span><text:span text:style-name="Default_20_Paragraph_20_Font"><text:span text:style-name="T2"> RaceDTO </text:span></text:span><text:span text:style-name="Default_20_Paragraph_20_Font"><text:span text:style-name="T1">extends</text:span></text:span><text:span text:style-name="Default_20_Paragraph_20_Font"><text:span text:style-name="T2"> BasicRaceDTO {</text:span></text:span></text:p>
      <text:p text:style-name="P3"><text:span text:style-name="Default_20_Paragraph_20_Font"><text:span text:style-name="T2"><text:s text:c="4"/></text:span></text:span><text:span text:style-name="Default_20_Paragraph_20_Font"><text:span text:style-name="T1">public</text:span></text:span><text:span text:style-name="Default_20_Paragraph_20_Font"><text:span text:style-name="T2"> </text:span></text:span><text:span text:style-name="Default_20_Paragraph_20_Font"><text:span text:style-name="T1">enum</text:span></text:span><text:span text:style-name="Default_20_Paragraph_20_Font"><text:span text:style-name="T2"> RaceLiveState { </text:span></text:span><text:span text:style-name="Default_20_Paragraph_20_Font"><text:span text:style-name="T4">NOT_TRACKED</text:span></text:span><text:span text:style-name="Default_20_Paragraph_20_Font"><text:span text:style-name="T2">, </text:span></text:span><text:span text:style-name="Default_20_Paragraph_20_Font"><text:span text:style-name="T4">TRACKED</text:span></text:span><text:span text:style-name="Default_20_Paragraph_20_Font"><text:span text:style-name="T2">, </text:span></text:span><text:span text:style-name="Default_20_Paragraph_20_Font"><text:span text:style-name="T4">TRACKED_AND_LIVE</text:span></text:span><text:span text:style-name="Default_20_Paragraph_20_Font"><text:span text:style-name="T2">, </text:span></text:span><text:span text:style-name="Default_20_Paragraph_20_Font"><text:span text:style-name="T2"><text:tab/></text:span></text:span><text:span text:style-name="Default_20_Paragraph_20_Font"><text:span text:style-name="T4">TRACKED_BUT_NOT_SCHEDULED</text:span></text:span><text:span text:style-name="Default_20_Paragraph_20_Font"><text:span text:style-name="T2"> };</text:span></text:span></text:p>
      <text:p text:style-name="P4">}</text:p>
      <text:h text:style-name="P17" text:outline-level="1"/>
      <text:h text:style-name="P18" text:outline-level="1">Derived states</text:h>
      <text:p text:style-name="P1"/>
      <text:p text:style-name="P1">Some display states are derived from the race states adding some more criteria like special time ranges or flags used.</text:p>
      <text:p text:style-name="P1"/>
      <text:h text:style-name="Heading_20_2" text:outline-level="2">State 'isLive'</text:h>
      <text:p text:style-name="P1"/>
      <text:p text:style-name="P1">The state 'isLive' means a race which is currently going on. This comprises also some time before the actual race start as well as time after the last boat has passed the finish time.</text:p>
      <text:p text:style-name="P1"/>
      <text:p text:style-name="P1">Server side</text:p>
      <text:p text:style-name="P1">- defined in TrackedRace.isLive(Timepoint at)</text:p>
      <text:p text:style-name="P1"/>
      <text:p text:style-name="P1">Client side</text:p>
      <text:p text:style-name="P1">- defined in RaceDTO.isLive(long serverTimePointAsMillis)</text:p>
      <text:p text:style-name="P1">- has similar logic like the server side isLive(), but needs the server clock time to determine the state</text:p>
      <text:p text:style-name="P1">- the serverTimePoint for the ‚isLive‘ test is the current client time minus the known ‚delay to live‘ plus the time difference between the client and the server<text:line-break/> (see com.sap.sse.gwt.client.player.Timer. getLiveTimePointInMillis())</text:p>
      <text:p text:style-name="P1">The way the difference between client and server time is handled is described in com.sap.sse.gwt.client.player.Timer.millisecondsClientIsBehindServer</text:p>
      <text:p text:style-name="P1"/>
      <text:h text:style-name="Heading_20_2" text:outline-level="2">State 'isOfPublicInterest'</text:h>
      <text:p text:style-name="P1"/>
      <text:p text:style-name="P1">The state 'isOfPublicInterest' means a race which is of interest for visitors and fans. This covers for sure races in 'live' state, but also e.g. the first scheduled race of a day or a race which has just been canceled or postponed. Currently the 'live now' list of sapsailing.com is using this state.</text:p>
      <text:p text:style-name="P1"/>
      <text:p text:style-name="P1">See... <office:annotation><dc:creator>Uhl, Axel</dc:creator><dc:date>2016-06-29T09:33:00</dc:date><text:p>The fact that this method does not accept a TimePoint as argument suggests that a RaceContext object is in some way relative to a certain TimePoint. I’ll make that clear in a comment. 7da10f65c1c7f5fa7ef534937a38fabe7ef9a1ba.</text:p></office:annotation>RaceContext.<text:span text:style-name="Default_20_Paragraph_20_Font"><text:span text:style-name="T2">isLiveOrOfPublicInterest()</text:span></text:span></text:p>
      <text:p text:style-name="P1"/>
      <text:p text:style-name="P1">- List of all races with state ‚live‘</text:p>
      <text:p text:style-name="P6">- Additionally races with special flag states of interest (General recall, <office:annotation><dc:creator>Uhl, Axel</dc:creator><dc:date>2016-06-29T09:32:00</dc:date><text:p>For these, what is the timing logic?</text:p></office:annotation>Postponed races, Abandoned races)</text:p>
      <text:p text:style-name="P7"/>
      <text:p text:style-name="P1"/>
      <text:p text:style-name="Standard"/>
      <text:p text:style-name="Standard"/>
      <text:p text:style-name="Standard"/>
      <text:p text:style-name="P20">State Specifications</text:p>
      <text:h text:style-name="Heading_20_1" text:outline-level="1">State isLive</text:h>
      <text:p text:style-name="Standard"/>
      <text:p text:style-name="Standard">The state 'isLive' describes an ongoing race for which we have relevant data of interest for visitors, sailors and not to forget the regatta officials. The state can be derived from the race time live state and the sensor data live state. For the calculation we also need to consider a potential time offset between the client and the server time as well as time zones.</text:p>
      <text:p text:style-name="Standard"/>
      <text:p text:style-name="Standard">Remark: The 'delay to live' time of a race is also important, but it should only influence the display of the state and not it's calculation.</text:p>
      <text:p text:style-name="Standard"/>
      <text:p text:style-name="Standard">Race time live state → Defined by the race times</text:p>
      <text:list xml:id="list33718447" text:style-name="L1">
        <text:list-item>
          <text:p text:style-name="P9">start of race</text:p>
        </text:list-item>
        <text:list-item>
          <text:p text:style-name="P9">end of race (or the 'blue flag down' state if available)</text:p>
        </text:list-item>
        <text:list-item>
          <text:p text:style-name="P9">a time period of interest before the start of the race</text:p>
        </text:list-item>
        <text:list-item>
          <text:p text:style-name="P9">a time period of interest after the end of the race</text:p>
        </text:list-item>
      </text:list>
      <text:p text:style-name="Standard">Sensor data live state → Defined by the available sensor data</text:p>
      <text:list xml:id="list33696594" text:style-name="L2">
        <text:list-item>
          <text:p text:style-name="P10">state of the competitor GPS data</text:p>
        </text:list-item>
        <text:list-item>
          <text:p text:style-name="P10">state of the course mark GPS data</text:p>
        </text:list-item>
        <text:list-item>
          <text:p text:style-name="P10">state of the wind data</text:p>
        </text:list-item>
        <text:list-item>
          <text:p text:style-name="P10">the mark passing times</text:p>
        </text:list-item>
      </text:list>
      <text:p text:style-name="Standard">Client/Server time offset</text:p>
      <text:list xml:id="list33692879" text:style-name="L3">
        <text:list-item>
          <text:p text:style-name="P11">Server time</text:p>
        </text:list-item>
        <text:list-item>
          <text:p text:style-name="P11">Client time</text:p>
        </text:list-item>
        <text:list-item>
          <text:p text:style-name="P11">Time zone?</text:p>
        </text:list-item>
      </text:list>
      <text:p text:style-name="Standard"/>
      <text:p text:style-name="Standard">As we use different feature sets for the regattas we have to support different scenarios for the calculation of the 'isLive' state.</text:p>
      <text:p text:style-name="Standard"/>
      <text:h text:style-name="Heading_20_2" text:outline-level="2">Scenario 1: RaceManager App with Tracking</text:h>
      <text:list xml:id="list33700634" text:style-name="L4">
        <text:list-item>
          <text:p text:style-name="P12">the race manager app defines the 'race time live state'</text:p>
        </text:list-item>
        <text:list-item>
          <text:p text:style-name="P12">the tracked data defines the 'sensor data live state'</text:p>
        </text:list-item>
      </text:list>
      <text:h text:style-name="Heading_20_2" text:outline-level="2">Scenario 2: RaceManager App without Tracking</text:h>
      <text:list xml:id="list35301242" text:continue-numbering="true" text:style-name="L4">
        <text:list-item>
          <text:p text:style-name="P12">the race manager app defines the 'race time live state'</text:p>
        </text:list-item>
        <text:list-item>
          <text:p text:style-name="P12">there is no sensor data live state</text:p>
        </text:list-item>
      </text:list>
      <text:h text:style-name="Heading_20_2" text:outline-level="2">Scenario 1: Tracking only</text:h>
      <text:list xml:id="list35306232" text:continue-numbering="true" text:style-name="L4">
        <text:list-item>
          <text:p text:style-name="P12">the tracked data defines the 'race time live state' and the 'sensor data live state'</text:p>
        </text:list-item>
      </text:list>
      <text:p text:style-name="Standard"/>
      <text:p text:style-name="Standard"/>
      <text:p text:style-name="Standard"/>
      <text:p text:style-name="Standard"/>
      <text:p text:style-name="Standard"/>
      <text:h text:style-name="P18" text:outline-level="1">State isOfPublicInterest</text:h>
      <text:p text:style-name="Standard"/>
      <text:p text:style-name="Standard">The state 'isOfPublicInterest' means a race which is of interest for visitors and fans beyond the 'isLive' state. The state can be derived from the 'isLive' state and some specific racelog events triggered by the race manager app.</text:p>
      <text:p text:style-name="Standard"/>
      <text:p text:style-name="Standard">Racelog events</text:p>
      <text:list xml:id="list33714983" text:style-name="L5">
        <text:list-item>
          <text:p text:style-name="P13">Flag 'Race Postponed'</text:p>
        </text:list-item>
        <text:list-item>
          <text:p text:style-name="P13">Flag 'Race Abandoned'</text:p>
        </text:list-item>
        <text:list-item>
          <text:p text:style-name="P13">Flag 'General Recall'</text:p>
        </text:list-item>
      </text:list>
      <text:list xml:id="list33689771" text:style-name="L6">
        <text:list-item>
          <text:p text:style-name="P14">Race scheduled</text:p>
        </text:list-item>
      </text:list>
      <text:p text:style-name="Standard"/>
      <text:p text:style-name="Standard">Each of these events defines a time which extends the time range belonging to the 'race times live state' <text:s/>of the 'isLive' state.</text:p>
      <text:p text:style-name="Standard"/>
      <text:list xml:id="list33714477" text:style-name="L8">
        <text:list-item>
          <text:p text:style-name="P16">Race Postponed: a time period after the flag has been raised</text:p>
        </text:list-item>
        <text:list-item>
          <text:p text:style-name="P16">Race Abandoned: a time period after the flag has been raised</text:p>
        </text:list-item>
        <text:list-item>
          <text:p text:style-name="P16">General Recall: a time period after the flag has been raised</text:p>
        </text:list-item>
        <text:list-item>
          <text:p text:style-name="P16">Race Scheduled: a time period before the scheduled start time</text:p>
        </text:list-item>
      </text:list>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egoe UI1" svg:font-family="'Segoe UI'" style:font-family-generic="swiss"/>
    <style:font-face style:name="Consolas" svg:font-family="Consolas"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S Mincho" style:font-size-asian="14pt" style:font-name-complex="Tahoma"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Standard" style:default-outline-level="1" style:class="text">
      <style:paragraph-properties fo:margin-top="0.353cm" fo:margin-bottom="0cm" fo:keep-together="always" fo:hyphenation-ladder-count="no-limit" fo:keep-with-next="always"/>
      <style:text-properties style:font-name="Trebuchet MS" fo:font-size="16pt" style:font-name-asian="Trebuchet MS" style:font-size-asian="16pt" style:font-name-complex="Trebuchet MS" style:font-size-complex="16pt" fo:hyphenate="false"/>
    </style:style>
    <style:style style:name="Heading_20_2" style:display-name="Heading 2" style:family="paragraph" style:parent-style-name="Standard" style:default-outline-level="2" style:class="text">
      <style:paragraph-properties fo:margin-top="0.353cm" fo:margin-bottom="0cm" fo:keep-together="always" fo:hyphenation-ladder-count="no-limit" fo:keep-with-next="always"/>
      <style:text-properties style:font-name="Trebuchet MS" fo:font-size="13pt" fo:font-weight="bold" style:font-name-asian="Trebuchet MS" style:font-size-asian="13pt" style:font-weight-asian="bold" style:font-name-complex="Trebuchet MS" style:font-size-complex="13pt" style:font-weight-complex="bold" fo:hyphenate="false"/>
    </style:style>
    <style:style style:name="Heading_20_3" style:display-name="Heading 3" style:family="paragraph" style:parent-style-name="Standard" style:default-outline-level="3" style:class="text">
      <style:paragraph-properties fo:margin-top="0.282cm" fo:margin-bottom="0cm" fo:keep-together="always" fo:hyphenation-ladder-count="no-limit" fo:keep-with-next="always"/>
      <style:text-properties fo:color="#666666" style:font-name="Trebuchet MS" fo:font-size="12pt" fo:font-weight="bold" style:font-name-asian="Trebuchet MS" style:font-size-asian="12pt" style:font-weight-asian="bold" style:font-name-complex="Trebuchet MS" style:font-size-complex="12pt" style:font-weight-complex="bold" fo:hyphenate="false"/>
    </style:style>
    <style:style style:name="Heading_20_4" style:display-name="Heading 4" style:family="paragraph" style:parent-style-name="Standard" style:default-outline-level="4" style:class="text">
      <style:paragraph-properties fo:margin-top="0.282cm" fo:margin-bottom="0cm" fo:keep-together="always" fo:hyphenation-ladder-count="no-limit" fo:keep-with-next="always"/>
      <style:text-properties fo:color="#666666" style:font-name="Trebuchet MS" style:text-underline-style="solid" style:text-underline-width="auto" style:text-underline-color="font-color" style:text-underline-mode="continuous" style:text-overline-mode="continuous" style:text-line-through-mode="continuous" style:font-name-asian="Trebuchet MS" style:font-name-complex="Trebuchet MS" fo:hyphenate="false"/>
    </style:style>
    <style:style style:name="Heading_20_5" style:display-name="Heading 5" style:family="paragraph" style:parent-style-name="Standard" style:default-outline-level="5" style:class="text">
      <style:paragraph-properties fo:margin-top="0.282cm" fo:margin-bottom="0cm" fo:keep-together="always" fo:hyphenation-ladder-count="no-limit" fo:keep-with-next="always"/>
      <style:text-properties fo:color="#666666" style:font-name="Trebuchet MS" style:font-name-asian="Trebuchet MS" style:font-name-complex="Trebuchet MS" fo:hyphenate="false"/>
    </style:style>
    <style:style style:name="Heading_20_6" style:display-name="Heading 6" style:family="paragraph" style:parent-style-name="Standard" style:default-outline-level="6" style:class="text">
      <style:paragraph-properties fo:margin-top="0.282cm" fo:margin-bottom="0cm" fo:keep-together="always" fo:hyphenation-ladder-count="no-limit" fo:keep-with-next="always"/>
      <style:text-properties fo:color="#666666" style:font-name="Trebuchet MS" fo:font-style="italic" style:font-name-asian="Trebuchet MS" style:font-style-asian="italic" style:font-name-complex="Trebuchet MS" style:font-style-complex="italic" fo:hyphenate="false"/>
    </style:style>
    <style:style style:name="Normal" style:family="paragraph">
      <style:paragraph-properties fo:hyphenation-ladder-count="no-limit"/>
      <style:text-properties fo:hyphenate="false"/>
    </style:style>
    <style:style style:name="No_20_List1" style:display-name="No List1" style:family="paragraph">
      <style:paragraph-properties fo:hyphenation-ladder-count="no-limit"/>
      <style:text-properties fo:hyphenate="false"/>
    </style:style>
    <style:style style:name="Title" style:family="paragraph" style:parent-style-name="Standard" style:class="chapter">
      <style:paragraph-properties fo:keep-together="always" fo:hyphenation-ladder-count="no-limit" fo:keep-with-next="always"/>
      <style:text-properties style:font-name="Trebuchet MS" fo:font-size="21pt" style:font-name-asian="Trebuchet MS" style:font-size-asian="21pt" style:font-name-complex="Trebuchet MS" style:font-size-complex="21pt" fo:hyphenate="false"/>
    </style:style>
    <style:style style:name="Subtitle" style:family="paragraph" style:parent-style-name="Standard" style:class="chapter">
      <style:paragraph-properties fo:margin-top="0cm" fo:margin-bottom="0.353cm" fo:keep-together="always" fo:hyphenation-ladder-count="no-limit" fo:keep-with-next="always"/>
      <style:text-properties fo:color="#666666" style:font-name="Trebuchet MS" fo:font-size="13pt" fo:font-style="italic" style:font-name-asian="Trebuchet MS" style:font-size-asian="13pt" style:font-style-asian="italic" style:font-name-complex="Trebuchet MS" style:font-size-complex="13pt" style:font-style-complex="italic" fo:hyphenate="false"/>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Revision" style:family="paragraph">
      <style:paragraph-properties fo:hyphenation-ladder-count="no-limit" style:vertical-align="auto"/>
      <style:text-properties fo:hyphenate="true"/>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Segoe UI" style:font-size-complex="9pt" fo:hyphenate="false"/>
    </style:style>
    <style:style style:name="Comment_20_Text" style:display-name="Comment Text" style:family="paragraph" style:parent-style-name="Normal">
      <style:paragraph-properties fo:hyphenation-ladder-count="no-limit"/>
      <style:text-properties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1LVL2" text:bullet-char="○">
        <style:list-level-properties text:list-level-position-and-space-mode="label-alignment">
          <style:list-level-label-alignment text:label-followed-by="listtab" fo:text-indent="-1.905cm" fo:margin-left="3.81cm"/>
        </style:list-level-properties>
      </text:list-level-style-bullet>
      <text:list-level-style-bullet text:level="3" text:style-name="WW_5f_CharLFO1LVL3" text:bullet-char="■">
        <style:list-level-properties text:list-level-position-and-space-mode="label-alignment">
          <style:list-level-label-alignment text:label-followed-by="listtab" fo:text-indent="-1.588cm" fo:margin-left="5.08cm"/>
        </style:list-level-properties>
      </text:list-level-style-bullet>
      <text:list-level-style-bullet text:level="4" text:style-name="WW_5f_CharLFO1LVL4" text:bullet-char="●">
        <style:list-level-properties text:list-level-position-and-space-mode="label-alignment">
          <style:list-level-label-alignment text:label-followed-by="listtab" fo:text-indent="-1.905cm" fo:margin-left="6.35cm"/>
        </style:list-level-properties>
      </text:list-level-style-bullet>
      <text:list-level-style-bullet text:level="5" text:style-name="WW_5f_CharLFO1LVL5" text:bullet-char="○">
        <style:list-level-properties text:list-level-position-and-space-mode="label-alignment">
          <style:list-level-label-alignment text:label-followed-by="listtab" fo:text-indent="-1.905cm" fo:margin-left="7.62cm"/>
        </style:list-level-properties>
      </text:list-level-style-bullet>
      <text:list-level-style-bullet text:level="6" text:style-name="WW_5f_CharLFO1LVL6" text:bullet-char="■">
        <style:list-level-properties text:list-level-position-and-space-mode="label-alignment">
          <style:list-level-label-alignment text:label-followed-by="listtab" fo:text-indent="-1.588cm" fo:margin-left="8.89cm"/>
        </style:list-level-properties>
      </text:list-level-style-bullet>
      <text:list-level-style-bullet text:level="7" text:style-name="WW_5f_CharLFO1LVL7" text:bullet-char="●">
        <style:list-level-properties text:list-level-position-and-space-mode="label-alignment">
          <style:list-level-label-alignment text:label-followed-by="listtab" fo:text-indent="-1.905cm" fo:margin-left="10.16cm"/>
        </style:list-level-properties>
      </text:list-level-style-bullet>
      <text:list-level-style-bullet text:level="8" text:style-name="WW_5f_CharLFO1LVL8" text:bullet-char="○">
        <style:list-level-properties text:list-level-position-and-space-mode="label-alignment">
          <style:list-level-label-alignment text:label-followed-by="listtab" fo:text-indent="-1.905cm" fo:margin-left="11.43cm"/>
        </style:list-level-properties>
      </text:list-level-style-bullet>
      <text:list-level-style-bullet text:level="9" text:style-name="WW_5f_CharLFO1LVL9" text:bullet-char="■">
        <style:list-level-properties text:list-level-position-and-space-mode="label-alignment">
          <style:list-level-label-alignment text:label-followed-by="listtab" fo:text-indent="-1.588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54cm" fo:margin-left="1.54cm" fo:margin-right="1.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title/>
    <meta:initial-creator>Uhl, Axel</meta:initial-creator>
    <meta:creation-date>2016-06-28T07:48:00Z</meta:creation-date>
    <dc:date>2016-08-05T15:12:29.46</dc:date>
    <meta:editing-cycles>64</meta:editing-cycles>
    <meta:editing-duration>PT6H7M12S</meta:editing-duration>
    <meta:document-statistic meta:table-count="0" meta:image-count="0" meta:object-count="0" meta:page-count="5" meta:paragraph-count="90" meta:word-count="932" meta:character-count="5981" meta:non-whitespace-character-count="5147"/>
    <meta:template xlink:type="simple" xlink:actuate="onRequest" xlink:title="" xlink:href="Normal.dotm"/>
  </office:meta>
</office:document-meta>
</file>