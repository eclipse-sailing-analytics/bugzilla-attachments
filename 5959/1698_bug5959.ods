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6in" svg:height="3.5457in" svg:x="2.4516in" svg:y="0.3654in">
            <draw:object draw:notify-on-update-of-ranges="Sheet1.A2:Sheet1.A371 Sheet1.B2:Sheet1.B3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92in" svg:height="3.5457in" svg:x="11.3969in" svg:y="0.2173in">
            <draw:object draw:notify-on-update-of-ranges="Sheet1.K2:Sheet1.K352 Sheet1.L2:Sheet1.L3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57in" svg:x="20.0791in" svg:y="0.0492in">
            <draw:object draw:notify-on-update-of-ranges="Sheet1.V2:Sheet1.V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92in" svg:height="3.5457in" svg:x="29.1807in" svg:y="0.0791in">
            <draw:object draw:notify-on-update-of-ranges="Sheet1.AF2:Sheet1.AF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bug5959</text:p>
          </table:table-cell>
          <table:table-cell office:value-type="string" calcext:value-type="string">
            <text:p>wind from</text:p>
          </table:table-cell>
          <table:table-cell table:number-columns-repeated="8"/>
          <table:table-cell office:value-type="string" calcext:value-type="string">
            <text:p>main</text:p>
          </table:table-cell>
          <table:table-cell office:value-type="string" calcext:value-type="string">
            <text:p>wind from</text:p>
          </table:table-cell>
          <table:table-cell table:number-columns-repeated="8"/>
          <table:table-cell office:value-type="string" calcext:value-type="string">
            <text:p>main</text:p>
          </table:table-cell>
          <table:table-cell office:value-type="string" calcext:value-type="string">
            <text:p>#maneuvers</text:p>
          </table:table-cell>
          <table:table-cell table:number-columns-repeated="8"/>
          <table:table-cell office:value-type="string" calcext:value-type="string">
            <text:p>bug5959</text:p>
          </table:table-cell>
          <table:table-cell office:value-type="string" calcext:value-type="string">
            <text:p>#maneuvers</text:p>
          </table:table-cell>
          <table:table-cell/>
        </table:table-row>
        <table:table-row table:style-name="ro1">
          <table:table-cell office:value-type="float" office:value="1308835099500" calcext:value-type="float">
            <text:p>130883509950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float" office:value="1308835102500" calcext:value-type="float">
            <text:p>1308835102500</text:p>
          </table:table-cell>
          <table:table-cell office:value-type="float" office:value="213" calcext:value-type="float">
            <text:p>21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8835268000" calcext:value-type="float">
            <text:p>1308835268000</text:p>
          </table:table-cell>
          <table:table-cell office:value-type="float" office:value="203" calcext:value-type="float">
            <text:p>203</text:p>
          </table:table-cell>
          <table:table-cell table:number-columns-repeated="8"/>
          <table:table-cell office:value-type="float" office:value="1308835274000" calcext:value-type="float">
            <text:p>1308835274000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8835271000" calcext:value-type="float">
            <text:p>1308835271000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office:value-type="float" office:value="1308835339500" calcext:value-type="float">
            <text:p>130883533950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8835339500" calcext:value-type="float">
            <text:p>130883533950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1308835472000" calcext:value-type="float">
            <text:p>1308835472000</text:p>
          </table:table-cell>
          <table:table-cell office:value-type="float" office:value="226" calcext:value-type="float">
            <text:p>226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8835364000" calcext:value-type="float">
            <text:p>1308835364000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1308835561500" calcext:value-type="float">
            <text:p>1308835561500</text:p>
          </table:table-cell>
          <table:table-cell office:value-type="float" office:value="217" calcext:value-type="float">
            <text:p>217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308835472000" calcext:value-type="float">
            <text:p>130883547200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1308835562500" calcext:value-type="float">
            <text:p>1308835562500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308835561500" calcext:value-type="float">
            <text:p>1308835561500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1308835586000" calcext:value-type="float">
            <text:p>1308835586000</text:p>
          </table:table-cell>
          <table:table-cell office:value-type="float" office:value="215" calcext:value-type="float">
            <text:p>215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308835562500" calcext:value-type="float">
            <text:p>1308835562500</text:p>
          </table:table-cell>
          <table:table-cell office:value-type="float" office:value="209" calcext:value-type="float">
            <text:p>209</text:p>
          </table:table-cell>
          <table:table-cell table:number-columns-repeated="8"/>
          <table:table-cell office:value-type="float" office:value="1308835607500" calcext:value-type="float">
            <text:p>1308835607500</text:p>
          </table:table-cell>
          <table:table-cell office:value-type="float" office:value="212" calcext:value-type="float">
            <text:p>212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308835583000" calcext:value-type="float">
            <text:p>1308835583000</text:p>
          </table:table-cell>
          <table:table-cell office:value-type="float" office:value="215" calcext:value-type="float">
            <text:p>215</text:p>
          </table:table-cell>
          <table:table-cell table:number-columns-repeated="8"/>
          <table:table-cell office:value-type="float" office:value="1308835643000" calcext:value-type="float">
            <text:p>1308835643000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308835604500" calcext:value-type="float">
            <text:p>1308835604500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1308835648500" calcext:value-type="float">
            <text:p>1308835648500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308835645500" calcext:value-type="float">
            <text:p>1308835645500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1308835648500" calcext:value-type="float">
            <text:p>1308835648500</text:p>
          </table:table-cell>
          <table:table-cell office:value-type="float" office:value="212" calcext:value-type="float">
            <text:p>212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308835646000" calcext:value-type="float">
            <text:p>130883564600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1308835673500" calcext:value-type="float">
            <text:p>1308835673500</text:p>
          </table:table-cell>
          <table:table-cell office:value-type="float" office:value="215" calcext:value-type="float">
            <text:p>21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308835648500" calcext:value-type="float">
            <text:p>130883564850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float" office:value="1308835679500" calcext:value-type="float">
            <text:p>1308835679500</text:p>
          </table:table-cell>
          <table:table-cell office:value-type="float" office:value="215" calcext:value-type="float">
            <text:p>21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308835670500" calcext:value-type="float">
            <text:p>1308835670500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1308835682500" calcext:value-type="float">
            <text:p>1308835682500</text:p>
          </table:table-cell>
          <table:table-cell office:value-type="float" office:value="217" calcext:value-type="float">
            <text:p>217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308835679500" calcext:value-type="float">
            <text:p>1308835679500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1308835682500" calcext:value-type="float">
            <text:p>1308835682500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308835679500" calcext:value-type="float">
            <text:p>130883567950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1308835699500" calcext:value-type="float">
            <text:p>1308835699500</text:p>
          </table:table-cell>
          <table:table-cell office:value-type="float" office:value="209" calcext:value-type="float">
            <text:p>20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308835682500" calcext:value-type="float">
            <text:p>1308835682500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1308835700500" calcext:value-type="float">
            <text:p>1308835700500</text:p>
          </table:table-cell>
          <table:table-cell office:value-type="float" office:value="218" calcext:value-type="float">
            <text:p>21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308835696500" calcext:value-type="float">
            <text:p>1308835696500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1308835703500" calcext:value-type="float">
            <text:p>1308835703500</text:p>
          </table:table-cell>
          <table:table-cell office:value-type="float" office:value="211" calcext:value-type="float">
            <text:p>211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308835700500" calcext:value-type="float">
            <text:p>1308835700500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float" office:value="1308835711500" calcext:value-type="float">
            <text:p>1308835711500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308835703500" calcext:value-type="float">
            <text:p>1308835703500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float" office:value="1308835712000" calcext:value-type="float">
            <text:p>1308835712000</text:p>
          </table:table-cell>
          <table:table-cell office:value-type="float" office:value="215" calcext:value-type="float">
            <text:p>215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308835708500" calcext:value-type="float">
            <text:p>130883570850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float" office:value="1308835715000" calcext:value-type="float">
            <text:p>1308835715000</text:p>
          </table:table-cell>
          <table:table-cell office:value-type="float" office:value="214" calcext:value-type="float">
            <text:p>21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308835709000" calcext:value-type="float">
            <text:p>130883570900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float" office:value="1308835715500" calcext:value-type="float">
            <text:p>1308835715500</text:p>
          </table:table-cell>
          <table:table-cell office:value-type="float" office:value="219" calcext:value-type="float">
            <text:p>219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308835709500" calcext:value-type="float">
            <text:p>130883570950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float" office:value="1308835715500" calcext:value-type="float">
            <text:p>1308835715500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308835712000" calcext:value-type="float">
            <text:p>130883571200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float" office:value="1308835757500" calcext:value-type="float">
            <text:p>1308835757500</text:p>
          </table:table-cell>
          <table:table-cell office:value-type="float" office:value="217" calcext:value-type="float">
            <text:p>217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308835712500" calcext:value-type="float">
            <text:p>1308835712500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1308835762500" calcext:value-type="float">
            <text:p>1308835762500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308835715500" calcext:value-type="float">
            <text:p>1308835715500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1308835769000" calcext:value-type="float">
            <text:p>1308835769000</text:p>
          </table:table-cell>
          <table:table-cell office:value-type="float" office:value="227" calcext:value-type="float">
            <text:p>227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308835757500" calcext:value-type="float">
            <text:p>1308835757500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float" office:value="1308835773000" calcext:value-type="float">
            <text:p>1308835773000</text:p>
          </table:table-cell>
          <table:table-cell office:value-type="float" office:value="214" calcext:value-type="float">
            <text:p>214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308835759500" calcext:value-type="float">
            <text:p>130883575950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1308835780500" calcext:value-type="float">
            <text:p>1308835780500</text:p>
          </table:table-cell>
          <table:table-cell office:value-type="float" office:value="220" calcext:value-type="float">
            <text:p>220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308835769000" calcext:value-type="float">
            <text:p>1308835769000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1308835780500" calcext:value-type="float">
            <text:p>1308835780500</text:p>
          </table:table-cell>
          <table:table-cell office:value-type="float" office:value="219" calcext:value-type="float">
            <text:p>219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08835773000" calcext:value-type="float">
            <text:p>130883577300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1308835787500" calcext:value-type="float">
            <text:p>1308835787500</text:p>
          </table:table-cell>
          <table:table-cell office:value-type="float" office:value="213" calcext:value-type="float">
            <text:p>21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308835777500" calcext:value-type="float">
            <text:p>1308835777500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office:value-type="float" office:value="1308835795500" calcext:value-type="float">
            <text:p>1308835795500</text:p>
          </table:table-cell>
          <table:table-cell office:value-type="float" office:value="214" calcext:value-type="float">
            <text:p>21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308835780500" calcext:value-type="float">
            <text:p>130883578050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1308835814500" calcext:value-type="float">
            <text:p>1308835814500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308835787500" calcext:value-type="float">
            <text:p>130883578750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1308835832500" calcext:value-type="float">
            <text:p>1308835832500</text:p>
          </table:table-cell>
          <table:table-cell office:value-type="float" office:value="223" calcext:value-type="float">
            <text:p>22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308835795500" calcext:value-type="float">
            <text:p>1308835795500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float" office:value="1308835834500" calcext:value-type="float">
            <text:p>1308835834500</text:p>
          </table:table-cell>
          <table:table-cell office:value-type="float" office:value="234" calcext:value-type="float">
            <text:p>234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308835814500" calcext:value-type="float">
            <text:p>130883581450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float" office:value="1308835834500" calcext:value-type="float">
            <text:p>1308835834500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157" calcext:value-type="float">
            <text:p>157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308835831500" calcext:value-type="float">
            <text:p>1308835831500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1308835840500" calcext:value-type="float">
            <text:p>1308835840500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308835832500" calcext:value-type="float">
            <text:p>130883583250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float" office:value="1308835843500" calcext:value-type="float">
            <text:p>1308835843500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308835837500" calcext:value-type="float">
            <text:p>130883583750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1308835877000" calcext:value-type="float">
            <text:p>1308835877000</text:p>
          </table:table-cell>
          <table:table-cell office:value-type="float" office:value="218" calcext:value-type="float">
            <text:p>21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308835840500" calcext:value-type="float">
            <text:p>130883584050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float" office:value="1308835882500" calcext:value-type="float">
            <text:p>1308835882500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241" calcext:value-type="float">
            <text:p>241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308835844000" calcext:value-type="float">
            <text:p>130883584400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float" office:value="1308835886500" calcext:value-type="float">
            <text:p>1308835886500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1308835877000" calcext:value-type="float">
            <text:p>130883587700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1308835907500" calcext:value-type="float">
            <text:p>1308835907500</text:p>
          </table:table-cell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1">
          <table:table-cell office:value-type="float" office:value="1308835879500" calcext:value-type="float">
            <text:p>1308835879500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office:value-type="float" office:value="1308835939500" calcext:value-type="float">
            <text:p>1308835939500</text:p>
          </table:table-cell>
          <table:table-cell office:value-type="float" office:value="224" calcext:value-type="float">
            <text:p>224</text:p>
          </table:table-cell>
          <table:table-cell table:number-columns-repeated="9"/>
          <table:table-cell table:formula="of:=SUM([.V2:.V41])" office:value-type="float" office:value="4569" calcext:value-type="float">
            <text:p>4569</text:p>
          </table:table-cell>
          <table:table-cell table:number-columns-repeated="9"/>
          <table:table-cell table:formula="of:=SUM([.AF2:.AF41])" office:value-type="float" office:value="3420" calcext:value-type="float">
            <text:p>3420</text:p>
          </table:table-cell>
          <table:table-cell table:style-name="ce1" table:formula="of:=[.AF43]/[.V43]" office:value-type="percentage" office:value="0.748522652659225" calcext:value-type="percentage">
            <text:p>74.85%</text:p>
          </table:table-cell>
        </table:table-row>
        <table:table-row table:style-name="ro1">
          <table:table-cell office:value-type="float" office:value="1308835886500" calcext:value-type="float">
            <text:p>1308835886500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1308835964500" calcext:value-type="float">
            <text:p>1308835964500</text:p>
          </table:table-cell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1">
          <table:table-cell office:value-type="float" office:value="1308835904500" calcext:value-type="float">
            <text:p>1308835904500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1308836042500" calcext:value-type="float">
            <text:p>1308836042500</text:p>
          </table:table-cell>
          <table:table-cell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office:value-type="float" office:value="1308835930500" calcext:value-type="float">
            <text:p>130883593050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float" office:value="1308836068500" calcext:value-type="float">
            <text:p>1308836068500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1308835939500" calcext:value-type="float">
            <text:p>130883593950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1308836078000" calcext:value-type="float">
            <text:p>1308836078000</text:p>
          </table:table-cell>
          <table:table-cell office:value-type="float" office:value="223" calcext:value-type="float">
            <text:p>223</text:p>
          </table:table-cell>
          <table:table-cell table:number-columns-repeated="21"/>
        </table:table-row>
        <table:table-row table:style-name="ro1">
          <table:table-cell office:value-type="float" office:value="1308835961500" calcext:value-type="float">
            <text:p>130883596150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1308836126500" calcext:value-type="float">
            <text:p>1308836126500</text:p>
          </table:table-cell>
          <table:table-cell office:value-type="float" office:value="228" calcext:value-type="float">
            <text:p>228</text:p>
          </table:table-cell>
          <table:table-cell table:number-columns-repeated="21"/>
        </table:table-row>
        <table:table-row table:style-name="ro1">
          <table:table-cell office:value-type="float" office:value="1308836039500" calcext:value-type="float">
            <text:p>130883603950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1308836170500" calcext:value-type="float">
            <text:p>1308836170500</text:p>
          </table:table-cell>
          <table:table-cell office:value-type="float" office:value="231" calcext:value-type="float">
            <text:p>231</text:p>
          </table:table-cell>
          <table:table-cell table:number-columns-repeated="21"/>
        </table:table-row>
        <table:table-row table:style-name="ro1">
          <table:table-cell office:value-type="float" office:value="1308836068500" calcext:value-type="float">
            <text:p>1308836068500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1308836177500" calcext:value-type="float">
            <text:p>1308836177500</text:p>
          </table:table-cell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1">
          <table:table-cell office:value-type="float" office:value="1308836075000" calcext:value-type="float">
            <text:p>1308836075000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1308836264500" calcext:value-type="float">
            <text:p>1308836264500</text:p>
          </table:table-cell>
          <table:table-cell office:value-type="float" office:value="218" calcext:value-type="float">
            <text:p>218</text:p>
          </table:table-cell>
          <table:table-cell table:number-columns-repeated="21"/>
        </table:table-row>
        <table:table-row table:style-name="ro1">
          <table:table-cell office:value-type="float" office:value="1308836126500" calcext:value-type="float">
            <text:p>1308836126500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1308836285000" calcext:value-type="float">
            <text:p>1308836285000</text:p>
          </table:table-cell>
          <table:table-cell office:value-type="float" office:value="223" calcext:value-type="float">
            <text:p>223</text:p>
          </table:table-cell>
          <table:table-cell table:number-columns-repeated="21"/>
        </table:table-row>
        <table:table-row table:style-name="ro1">
          <table:table-cell office:value-type="float" office:value="1308836150000" calcext:value-type="float">
            <text:p>130883615000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1308836294000" calcext:value-type="float">
            <text:p>1308836294000</text:p>
          </table:table-cell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1">
          <table:table-cell office:value-type="float" office:value="1308836167500" calcext:value-type="float">
            <text:p>13088361675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36317500" calcext:value-type="float">
            <text:p>1308836317500</text:p>
          </table:table-cell>
          <table:table-cell office:value-type="float" office:value="218" calcext:value-type="float">
            <text:p>218</text:p>
          </table:table-cell>
          <table:table-cell table:number-columns-repeated="21"/>
        </table:table-row>
        <table:table-row table:style-name="ro1">
          <table:table-cell office:value-type="float" office:value="1308836174500" calcext:value-type="float">
            <text:p>1308836174500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office:value-type="float" office:value="1308836320500" calcext:value-type="float">
            <text:p>1308836320500</text:p>
          </table:table-cell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float" office:value="1308836264500" calcext:value-type="float">
            <text:p>130883626450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1308836362500" calcext:value-type="float">
            <text:p>1308836362500</text:p>
          </table:table-cell>
          <table:table-cell office:value-type="float" office:value="220" calcext:value-type="float">
            <text:p>220</text:p>
          </table:table-cell>
          <table:table-cell table:number-columns-repeated="21"/>
        </table:table-row>
        <table:table-row table:style-name="ro1">
          <table:table-cell office:value-type="float" office:value="1308836273500" calcext:value-type="float">
            <text:p>130883627350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float" office:value="1308836365500" calcext:value-type="float">
            <text:p>1308836365500</text:p>
          </table:table-cell>
          <table:table-cell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office:value-type="float" office:value="1308836285000" calcext:value-type="float">
            <text:p>130883628500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1308836365500" calcext:value-type="float">
            <text:p>1308836365500</text:p>
          </table:table-cell>
          <table:table-cell office:value-type="float" office:value="218" calcext:value-type="float">
            <text:p>218</text:p>
          </table:table-cell>
          <table:table-cell table:number-columns-repeated="21"/>
        </table:table-row>
        <table:table-row table:style-name="ro1">
          <table:table-cell office:value-type="float" office:value="1308836291000" calcext:value-type="float">
            <text:p>130883629100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float" office:value="1308836365500" calcext:value-type="float">
            <text:p>1308836365500</text:p>
          </table:table-cell>
          <table:table-cell office:value-type="float" office:value="221" calcext:value-type="float">
            <text:p>221</text:p>
          </table:table-cell>
          <table:table-cell table:number-columns-repeated="21"/>
        </table:table-row>
        <table:table-row table:style-name="ro1">
          <table:table-cell office:value-type="float" office:value="1308836317500" calcext:value-type="float">
            <text:p>1308836317500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office:value-type="float" office:value="1308836386500" calcext:value-type="float">
            <text:p>1308836386500</text:p>
          </table:table-cell>
          <table:table-cell office:value-type="float" office:value="222" calcext:value-type="float">
            <text:p>222</text:p>
          </table:table-cell>
          <table:table-cell table:number-columns-repeated="21"/>
        </table:table-row>
        <table:table-row table:style-name="ro1">
          <table:table-cell office:value-type="float" office:value="1308836320500" calcext:value-type="float">
            <text:p>13088363205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36396500" calcext:value-type="float">
            <text:p>1308836396500</text:p>
          </table:table-cell>
          <table:table-cell office:value-type="float" office:value="228" calcext:value-type="float">
            <text:p>228</text:p>
          </table:table-cell>
          <table:table-cell table:number-columns-repeated="21"/>
        </table:table-row>
        <table:table-row table:style-name="ro1">
          <table:table-cell office:value-type="float" office:value="1308836362500" calcext:value-type="float">
            <text:p>130883636250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1308836411500" calcext:value-type="float">
            <text:p>1308836411500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1308836362500" calcext:value-type="float">
            <text:p>130883636250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1308836429000" calcext:value-type="float">
            <text:p>1308836429000</text:p>
          </table:table-cell>
          <table:table-cell office:value-type="float" office:value="220" calcext:value-type="float">
            <text:p>220</text:p>
          </table:table-cell>
          <table:table-cell table:number-columns-repeated="21"/>
        </table:table-row>
        <table:table-row table:style-name="ro1">
          <table:table-cell office:value-type="float" office:value="1308836365500" calcext:value-type="float">
            <text:p>1308836365500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1308836432500" calcext:value-type="float">
            <text:p>1308836432500</text:p>
          </table:table-cell>
          <table:table-cell office:value-type="float" office:value="223" calcext:value-type="float">
            <text:p>223</text:p>
          </table:table-cell>
          <table:table-cell table:number-columns-repeated="21"/>
        </table:table-row>
        <table:table-row table:style-name="ro1">
          <table:table-cell office:value-type="float" office:value="1308836365500" calcext:value-type="float">
            <text:p>1308836365500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office:value-type="float" office:value="1308836443500" calcext:value-type="float">
            <text:p>1308836443500</text:p>
          </table:table-cell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1">
          <table:table-cell office:value-type="float" office:value="1308836396500" calcext:value-type="float">
            <text:p>130883639650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1308836447500" calcext:value-type="float">
            <text:p>1308836447500</text:p>
          </table:table-cell>
          <table:table-cell office:value-type="float" office:value="221" calcext:value-type="float">
            <text:p>221</text:p>
          </table:table-cell>
          <table:table-cell table:number-columns-repeated="21"/>
        </table:table-row>
        <table:table-row table:style-name="ro1">
          <table:table-cell office:value-type="float" office:value="1308836411500" calcext:value-type="float">
            <text:p>1308836411500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office:value-type="float" office:value="1308836464500" calcext:value-type="float">
            <text:p>1308836464500</text:p>
          </table:table-cell>
          <table:table-cell office:value-type="float" office:value="224" calcext:value-type="float">
            <text:p>224</text:p>
          </table:table-cell>
          <table:table-cell table:number-columns-repeated="21"/>
        </table:table-row>
        <table:table-row table:style-name="ro1">
          <table:table-cell office:value-type="float" office:value="1308836426000" calcext:value-type="float">
            <text:p>130883642600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1308836465500" calcext:value-type="float">
            <text:p>1308836465500</text:p>
          </table:table-cell>
          <table:table-cell office:value-type="float" office:value="222" calcext:value-type="float">
            <text:p>222</text:p>
          </table:table-cell>
          <table:table-cell table:number-columns-repeated="21"/>
        </table:table-row>
        <table:table-row table:style-name="ro1">
          <table:table-cell office:value-type="float" office:value="1308836432500" calcext:value-type="float">
            <text:p>130883643250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1308836471000" calcext:value-type="float">
            <text:p>13088364710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6443500" calcext:value-type="float">
            <text:p>1308836443500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office:value-type="float" office:value="1308836510500" calcext:value-type="float">
            <text:p>1308836510500</text:p>
          </table:table-cell>
          <table:table-cell office:value-type="float" office:value="218" calcext:value-type="float">
            <text:p>218</text:p>
          </table:table-cell>
          <table:table-cell table:number-columns-repeated="21"/>
        </table:table-row>
        <table:table-row table:style-name="ro1">
          <table:table-cell office:value-type="float" office:value="1308836447500" calcext:value-type="float">
            <text:p>130883644750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1308836515500" calcext:value-type="float">
            <text:p>1308836515500</text:p>
          </table:table-cell>
          <table:table-cell office:value-type="float" office:value="224" calcext:value-type="float">
            <text:p>224</text:p>
          </table:table-cell>
          <table:table-cell table:number-columns-repeated="21"/>
        </table:table-row>
        <table:table-row table:style-name="ro1">
          <table:table-cell office:value-type="float" office:value="1308836461500" calcext:value-type="float">
            <text:p>130883646150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1308836525000" calcext:value-type="float">
            <text:p>1308836525000</text:p>
          </table:table-cell>
          <table:table-cell office:value-type="float" office:value="216" calcext:value-type="float">
            <text:p>216</text:p>
          </table:table-cell>
          <table:table-cell table:number-columns-repeated="21"/>
        </table:table-row>
        <table:table-row table:style-name="ro1">
          <table:table-cell office:value-type="float" office:value="1308836462500" calcext:value-type="float">
            <text:p>1308836462500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office:value-type="float" office:value="1308836534500" calcext:value-type="float">
            <text:p>1308836534500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1308836471000" calcext:value-type="float">
            <text:p>1308836471000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1308836582500" calcext:value-type="float">
            <text:p>13088365825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36512500" calcext:value-type="float">
            <text:p>130883651250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float" office:value="1308836675500" calcext:value-type="float">
            <text:p>1308836675500</text:p>
          </table:table-cell>
          <table:table-cell office:value-type="float" office:value="223" calcext:value-type="float">
            <text:p>223</text:p>
          </table:table-cell>
          <table:table-cell table:number-columns-repeated="21"/>
        </table:table-row>
        <table:table-row table:style-name="ro1">
          <table:table-cell office:value-type="float" office:value="1308836525000" calcext:value-type="float">
            <text:p>1308836525000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float" office:value="1308836707500" calcext:value-type="float">
            <text:p>13088367075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6534500" calcext:value-type="float">
            <text:p>1308836534500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office:value-type="float" office:value="1308836708500" calcext:value-type="float">
            <text:p>1308836708500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1308836582500" calcext:value-type="float">
            <text:p>13088365825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36714500" calcext:value-type="float">
            <text:p>1308836714500</text:p>
          </table:table-cell>
          <table:table-cell office:value-type="float" office:value="231" calcext:value-type="float">
            <text:p>231</text:p>
          </table:table-cell>
          <table:table-cell table:number-columns-repeated="21"/>
        </table:table-row>
        <table:table-row table:style-name="ro1">
          <table:table-cell office:value-type="float" office:value="1308836675500" calcext:value-type="float">
            <text:p>130883667550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1308836720500" calcext:value-type="float">
            <text:p>1308836720500</text:p>
          </table:table-cell>
          <table:table-cell office:value-type="float" office:value="223" calcext:value-type="float">
            <text:p>223</text:p>
          </table:table-cell>
          <table:table-cell table:number-columns-repeated="21"/>
        </table:table-row>
        <table:table-row table:style-name="ro1">
          <table:table-cell office:value-type="float" office:value="1308836704500" calcext:value-type="float">
            <text:p>1308836704500</text:p>
          </table:table-cell>
          <table:table-cell office:value-type="float" office:value="231" calcext:value-type="float">
            <text:p>231</text:p>
          </table:table-cell>
          <table:table-cell table:number-columns-repeated="8"/>
          <table:table-cell office:value-type="float" office:value="1308836732500" calcext:value-type="float">
            <text:p>1308836732500</text:p>
          </table:table-cell>
          <table:table-cell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office:value-type="float" office:value="1308836705500" calcext:value-type="float">
            <text:p>1308836705500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office:value-type="float" office:value="1308836747500" calcext:value-type="float">
            <text:p>1308836747500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1308836714500" calcext:value-type="float">
            <text:p>1308836714500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office:value-type="float" office:value="1308836756000" calcext:value-type="float">
            <text:p>13088367560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36720500" calcext:value-type="float">
            <text:p>1308836720500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1308836816500" calcext:value-type="float">
            <text:p>1308836816500</text:p>
          </table:table-cell>
          <table:table-cell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office:value-type="float" office:value="1308836732500" calcext:value-type="float">
            <text:p>1308836732500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office:value-type="float" office:value="1308836919000" calcext:value-type="float">
            <text:p>1308836919000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1308836747500" calcext:value-type="float">
            <text:p>1308836747500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office:value-type="float" office:value="1308836935500" calcext:value-type="float">
            <text:p>1308836935500</text:p>
          </table:table-cell>
          <table:table-cell office:value-type="float" office:value="224" calcext:value-type="float">
            <text:p>224</text:p>
          </table:table-cell>
          <table:table-cell table:number-columns-repeated="21"/>
        </table:table-row>
        <table:table-row table:style-name="ro1">
          <table:table-cell office:value-type="float" office:value="1308836753000" calcext:value-type="float">
            <text:p>1308836753000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office:value-type="float" office:value="1308836936500" calcext:value-type="float">
            <text:p>13088369365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36765500" calcext:value-type="float">
            <text:p>1308836765500</text:p>
          </table:table-cell>
          <table:table-cell office:value-type="float" office:value="232" calcext:value-type="float">
            <text:p>232</text:p>
          </table:table-cell>
          <table:table-cell table:number-columns-repeated="8"/>
          <table:table-cell office:value-type="float" office:value="1308836945000" calcext:value-type="float">
            <text:p>13088369450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6816500" calcext:value-type="float">
            <text:p>1308836816500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office:value-type="float" office:value="1308836968500" calcext:value-type="float">
            <text:p>1308836968500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1308836873500" calcext:value-type="float">
            <text:p>130883687350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1308836971500" calcext:value-type="float">
            <text:p>1308836971500</text:p>
          </table:table-cell>
          <table:table-cell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office:value-type="float" office:value="1308836916000" calcext:value-type="float">
            <text:p>130883691600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float" office:value="1308836977500" calcext:value-type="float">
            <text:p>1308836977500</text:p>
          </table:table-cell>
          <table:table-cell office:value-type="float" office:value="213" calcext:value-type="float">
            <text:p>213</text:p>
          </table:table-cell>
          <table:table-cell table:number-columns-repeated="21"/>
        </table:table-row>
        <table:table-row table:style-name="ro1">
          <table:table-cell office:value-type="float" office:value="1308836935500" calcext:value-type="float">
            <text:p>130883693550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float" office:value="1308836983500" calcext:value-type="float">
            <text:p>1308836983500</text:p>
          </table:table-cell>
          <table:table-cell office:value-type="float" office:value="221" calcext:value-type="float">
            <text:p>221</text:p>
          </table:table-cell>
          <table:table-cell table:number-columns-repeated="21"/>
        </table:table-row>
        <table:table-row table:style-name="ro1">
          <table:table-cell office:value-type="float" office:value="1308836939500" calcext:value-type="float">
            <text:p>1308836939500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office:value-type="float" office:value="1308836983500" calcext:value-type="float">
            <text:p>1308836983500</text:p>
          </table:table-cell>
          <table:table-cell office:value-type="float" office:value="228" calcext:value-type="float">
            <text:p>228</text:p>
          </table:table-cell>
          <table:table-cell table:number-columns-repeated="21"/>
        </table:table-row>
        <table:table-row table:style-name="ro1">
          <table:table-cell office:value-type="float" office:value="1308836948000" calcext:value-type="float">
            <text:p>13088369480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37004500" calcext:value-type="float">
            <text:p>1308837004500</text:p>
          </table:table-cell>
          <table:table-cell office:value-type="float" office:value="224" calcext:value-type="float">
            <text:p>224</text:p>
          </table:table-cell>
          <table:table-cell table:number-columns-repeated="21"/>
        </table:table-row>
        <table:table-row table:style-name="ro1">
          <table:table-cell office:value-type="float" office:value="1308836971500" calcext:value-type="float">
            <text:p>1308836971500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office:value-type="float" office:value="1308837005500" calcext:value-type="float">
            <text:p>1308837005500</text:p>
          </table:table-cell>
          <table:table-cell office:value-type="float" office:value="228" calcext:value-type="float">
            <text:p>228</text:p>
          </table:table-cell>
          <table:table-cell table:number-columns-repeated="21"/>
        </table:table-row>
        <table:table-row table:style-name="ro1">
          <table:table-cell office:value-type="float" office:value="1308836974500" calcext:value-type="float">
            <text:p>1308836974500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1308837018000" calcext:value-type="float">
            <text:p>13088370180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6980500" calcext:value-type="float">
            <text:p>1308836980500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1308837053000" calcext:value-type="float">
            <text:p>1308837053000</text:p>
          </table:table-cell>
          <table:table-cell office:value-type="float" office:value="237" calcext:value-type="float">
            <text:p>237</text:p>
          </table:table-cell>
          <table:table-cell table:number-columns-repeated="21"/>
        </table:table-row>
        <table:table-row table:style-name="ro1">
          <table:table-cell office:value-type="float" office:value="1308836980500" calcext:value-type="float">
            <text:p>130883698050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float" office:value="1308837163500" calcext:value-type="float">
            <text:p>13088371635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7005500" calcext:value-type="float">
            <text:p>130883700550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1308837211500" calcext:value-type="float">
            <text:p>1308837211500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1308837031500" calcext:value-type="float">
            <text:p>1308837031500</text:p>
          </table:table-cell>
          <table:table-cell office:value-type="float" office:value="230" calcext:value-type="float">
            <text:p>230</text:p>
          </table:table-cell>
          <table:table-cell table:number-columns-repeated="8"/>
          <table:table-cell office:value-type="float" office:value="1308837239000" calcext:value-type="float">
            <text:p>1308837239000</text:p>
          </table:table-cell>
          <table:table-cell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office:value-type="float" office:value="1308837050000" calcext:value-type="float">
            <text:p>1308837050000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office:value-type="float" office:value="1308837254500" calcext:value-type="float">
            <text:p>1308837254500</text:p>
          </table:table-cell>
          <table:table-cell office:value-type="float" office:value="230" calcext:value-type="float">
            <text:p>230</text:p>
          </table:table-cell>
          <table:table-cell table:number-columns-repeated="21"/>
        </table:table-row>
        <table:table-row table:style-name="ro1">
          <table:table-cell office:value-type="float" office:value="1308837160500" calcext:value-type="float">
            <text:p>1308837160500</text:p>
          </table:table-cell>
          <table:table-cell office:value-type="float" office:value="237" calcext:value-type="float">
            <text:p>237</text:p>
          </table:table-cell>
          <table:table-cell table:number-columns-repeated="8"/>
          <table:table-cell office:value-type="float" office:value="1308837289500" calcext:value-type="float">
            <text:p>13088372895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37211500" calcext:value-type="float">
            <text:p>1308837211500</text:p>
          </table:table-cell>
          <table:table-cell office:value-type="float" office:value="226" calcext:value-type="float">
            <text:p>226</text:p>
          </table:table-cell>
          <table:table-cell table:number-columns-repeated="8"/>
          <table:table-cell office:value-type="float" office:value="1308837298500" calcext:value-type="float">
            <text:p>1308837298500</text:p>
          </table:table-cell>
          <table:table-cell office:value-type="float" office:value="228" calcext:value-type="float">
            <text:p>228</text:p>
          </table:table-cell>
          <table:table-cell table:number-columns-repeated="21"/>
        </table:table-row>
        <table:table-row table:style-name="ro1">
          <table:table-cell office:value-type="float" office:value="1308837242000" calcext:value-type="float">
            <text:p>1308837242000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office:value-type="float" office:value="1308837368000" calcext:value-type="float">
            <text:p>1308837368000</text:p>
          </table:table-cell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1308837254500" calcext:value-type="float">
            <text:p>1308837254500</text:p>
          </table:table-cell>
          <table:table-cell office:value-type="float" office:value="227" calcext:value-type="float">
            <text:p>227</text:p>
          </table:table-cell>
          <table:table-cell table:number-columns-repeated="8"/>
          <table:table-cell office:value-type="float" office:value="1308837391500" calcext:value-type="float">
            <text:p>13088373915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37289500" calcext:value-type="float">
            <text:p>1308837289500</text:p>
          </table:table-cell>
          <table:table-cell office:value-type="float" office:value="227" calcext:value-type="float">
            <text:p>227</text:p>
          </table:table-cell>
          <table:table-cell table:number-columns-repeated="8"/>
          <table:table-cell office:value-type="float" office:value="1308837407500" calcext:value-type="float">
            <text:p>13088374075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7298500" calcext:value-type="float">
            <text:p>1308837298500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office:value-type="float" office:value="1308837410000" calcext:value-type="float">
            <text:p>1308837410000</text:p>
          </table:table-cell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1">
          <table:table-cell office:value-type="float" office:value="1308837388500" calcext:value-type="float">
            <text:p>1308837388500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office:value-type="float" office:value="1308837413500" calcext:value-type="float">
            <text:p>13088374135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37407500" calcext:value-type="float">
            <text:p>1308837407500</text:p>
          </table:table-cell>
          <table:table-cell office:value-type="float" office:value="230" calcext:value-type="float">
            <text:p>230</text:p>
          </table:table-cell>
          <table:table-cell table:number-columns-repeated="8"/>
          <table:table-cell office:value-type="float" office:value="1308837449500" calcext:value-type="float">
            <text:p>1308837449500</text:p>
          </table:table-cell>
          <table:table-cell office:value-type="float" office:value="230" calcext:value-type="float">
            <text:p>230</text:p>
          </table:table-cell>
          <table:table-cell table:number-columns-repeated="21"/>
        </table:table-row>
        <table:table-row table:style-name="ro1">
          <table:table-cell office:value-type="float" office:value="1308837410000" calcext:value-type="float">
            <text:p>1308837410000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office:value-type="float" office:value="1308837461000" calcext:value-type="float">
            <text:p>1308837461000</text:p>
          </table:table-cell>
          <table:table-cell office:value-type="float" office:value="228" calcext:value-type="float">
            <text:p>228</text:p>
          </table:table-cell>
          <table:table-cell table:number-columns-repeated="21"/>
        </table:table-row>
        <table:table-row table:style-name="ro1">
          <table:table-cell office:value-type="float" office:value="1308837410500" calcext:value-type="float">
            <text:p>1308837410500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office:value-type="float" office:value="1308837475500" calcext:value-type="float">
            <text:p>1308837475500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1308837446500" calcext:value-type="float">
            <text:p>1308837446500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office:value-type="float" office:value="1308837493500" calcext:value-type="float">
            <text:p>1308837493500</text:p>
          </table:table-cell>
          <table:table-cell office:value-type="float" office:value="230" calcext:value-type="float">
            <text:p>230</text:p>
          </table:table-cell>
          <table:table-cell table:number-columns-repeated="21"/>
        </table:table-row>
        <table:table-row table:style-name="ro1">
          <table:table-cell office:value-type="float" office:value="1308837461000" calcext:value-type="float">
            <text:p>1308837461000</text:p>
          </table:table-cell>
          <table:table-cell office:value-type="float" office:value="226" calcext:value-type="float">
            <text:p>226</text:p>
          </table:table-cell>
          <table:table-cell table:number-columns-repeated="8"/>
          <table:table-cell office:value-type="float" office:value="1308837497500" calcext:value-type="float">
            <text:p>1308837497500</text:p>
          </table:table-cell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1308837472500" calcext:value-type="float">
            <text:p>1308837472500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office:value-type="float" office:value="1308837497500" calcext:value-type="float">
            <text:p>13088374975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7493500" calcext:value-type="float">
            <text:p>1308837493500</text:p>
          </table:table-cell>
          <table:table-cell office:value-type="float" office:value="231" calcext:value-type="float">
            <text:p>231</text:p>
          </table:table-cell>
          <table:table-cell table:number-columns-repeated="8"/>
          <table:table-cell office:value-type="float" office:value="1308837497500" calcext:value-type="float">
            <text:p>1308837497500</text:p>
          </table:table-cell>
          <table:table-cell office:value-type="float" office:value="222" calcext:value-type="float">
            <text:p>222</text:p>
          </table:table-cell>
          <table:table-cell table:number-columns-repeated="21"/>
        </table:table-row>
        <table:table-row table:style-name="ro1">
          <table:table-cell office:value-type="float" office:value="1308837494500" calcext:value-type="float">
            <text:p>1308837494500</text:p>
          </table:table-cell>
          <table:table-cell office:value-type="float" office:value="230" calcext:value-type="float">
            <text:p>230</text:p>
          </table:table-cell>
          <table:table-cell table:number-columns-repeated="8"/>
          <table:table-cell office:value-type="float" office:value="1308837505500" calcext:value-type="float">
            <text:p>1308837505500</text:p>
          </table:table-cell>
          <table:table-cell office:value-type="float" office:value="223" calcext:value-type="float">
            <text:p>223</text:p>
          </table:table-cell>
          <table:table-cell table:number-columns-repeated="21"/>
        </table:table-row>
        <table:table-row table:style-name="ro1">
          <table:table-cell office:value-type="float" office:value="1308837497500" calcext:value-type="float">
            <text:p>1308837497500</text:p>
          </table:table-cell>
          <table:table-cell office:value-type="float" office:value="223" calcext:value-type="float">
            <text:p>223</text:p>
          </table:table-cell>
          <table:table-cell table:number-columns-repeated="8"/>
          <table:table-cell office:value-type="float" office:value="1308837506500" calcext:value-type="float">
            <text:p>1308837506500</text:p>
          </table:table-cell>
          <table:table-cell office:value-type="float" office:value="223" calcext:value-type="float">
            <text:p>223</text:p>
          </table:table-cell>
          <table:table-cell table:number-columns-repeated="21"/>
        </table:table-row>
        <table:table-row table:style-name="ro1">
          <table:table-cell office:value-type="float" office:value="1308837497500" calcext:value-type="float">
            <text:p>1308837497500</text:p>
          </table:table-cell>
          <table:table-cell office:value-type="float" office:value="232" calcext:value-type="float">
            <text:p>232</text:p>
          </table:table-cell>
          <table:table-cell table:number-columns-repeated="8"/>
          <table:table-cell office:value-type="float" office:value="1308837509000" calcext:value-type="float">
            <text:p>1308837509000</text:p>
          </table:table-cell>
          <table:table-cell office:value-type="float" office:value="223" calcext:value-type="float">
            <text:p>223</text:p>
          </table:table-cell>
          <table:table-cell table:number-columns-repeated="21"/>
        </table:table-row>
        <table:table-row table:style-name="ro1">
          <table:table-cell office:value-type="float" office:value="1308837502500" calcext:value-type="float">
            <text:p>1308837502500</text:p>
          </table:table-cell>
          <table:table-cell office:value-type="float" office:value="226" calcext:value-type="float">
            <text:p>226</text:p>
          </table:table-cell>
          <table:table-cell table:number-columns-repeated="8"/>
          <table:table-cell office:value-type="float" office:value="1308837524000" calcext:value-type="float">
            <text:p>1308837524000</text:p>
          </table:table-cell>
          <table:table-cell office:value-type="float" office:value="222" calcext:value-type="float">
            <text:p>222</text:p>
          </table:table-cell>
          <table:table-cell table:number-columns-repeated="21"/>
        </table:table-row>
        <table:table-row table:style-name="ro1">
          <table:table-cell office:value-type="float" office:value="1308837506500" calcext:value-type="float">
            <text:p>1308837506500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office:value-type="float" office:value="1308837527500" calcext:value-type="float">
            <text:p>1308837527500</text:p>
          </table:table-cell>
          <table:table-cell office:value-type="float" office:value="230" calcext:value-type="float">
            <text:p>230</text:p>
          </table:table-cell>
          <table:table-cell table:number-columns-repeated="21"/>
        </table:table-row>
        <table:table-row table:style-name="ro1">
          <table:table-cell office:value-type="float" office:value="1308837509000" calcext:value-type="float">
            <text:p>1308837509000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office:value-type="float" office:value="1308837536500" calcext:value-type="float">
            <text:p>13088375365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37524000" calcext:value-type="float">
            <text:p>1308837524000</text:p>
          </table:table-cell>
          <table:table-cell office:value-type="float" office:value="227" calcext:value-type="float">
            <text:p>227</text:p>
          </table:table-cell>
          <table:table-cell table:number-columns-repeated="8"/>
          <table:table-cell office:value-type="float" office:value="1308837539000" calcext:value-type="float">
            <text:p>1308837539000</text:p>
          </table:table-cell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float" office:value="1308837527500" calcext:value-type="float">
            <text:p>1308837527500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office:value-type="float" office:value="1308837553500" calcext:value-type="float">
            <text:p>1308837553500</text:p>
          </table:table-cell>
          <table:table-cell office:value-type="float" office:value="222" calcext:value-type="float">
            <text:p>222</text:p>
          </table:table-cell>
          <table:table-cell table:number-columns-repeated="21"/>
        </table:table-row>
        <table:table-row table:style-name="ro1">
          <table:table-cell office:value-type="float" office:value="1308837533500" calcext:value-type="float">
            <text:p>1308837533500</text:p>
          </table:table-cell>
          <table:table-cell office:value-type="float" office:value="233" calcext:value-type="float">
            <text:p>233</text:p>
          </table:table-cell>
          <table:table-cell table:number-columns-repeated="8"/>
          <table:table-cell office:value-type="float" office:value="1308837553500" calcext:value-type="float">
            <text:p>1308837553500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1308837539000" calcext:value-type="float">
            <text:p>130883753900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1308837553500" calcext:value-type="float">
            <text:p>1308837553500</text:p>
          </table:table-cell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1">
          <table:table-cell office:value-type="float" office:value="1308837553500" calcext:value-type="float">
            <text:p>1308837553500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1308837569500" calcext:value-type="float">
            <text:p>1308837569500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1308837553500" calcext:value-type="float">
            <text:p>1308837553500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float" office:value="1308837575500" calcext:value-type="float">
            <text:p>13088375755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7553500" calcext:value-type="float">
            <text:p>130883755350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float" office:value="1308837590000" calcext:value-type="float">
            <text:p>1308837590000</text:p>
          </table:table-cell>
          <table:table-cell office:value-type="float" office:value="224" calcext:value-type="float">
            <text:p>224</text:p>
          </table:table-cell>
          <table:table-cell table:number-columns-repeated="21"/>
        </table:table-row>
        <table:table-row table:style-name="ro1">
          <table:table-cell office:value-type="float" office:value="1308837563500" calcext:value-type="float">
            <text:p>1308837563500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table-cell office:value-type="float" office:value="1308837590500" calcext:value-type="float">
            <text:p>1308837590500</text:p>
          </table:table-cell>
          <table:table-cell office:value-type="float" office:value="228" calcext:value-type="float">
            <text:p>228</text:p>
          </table:table-cell>
          <table:table-cell table:number-columns-repeated="21"/>
        </table:table-row>
        <table:table-row table:style-name="ro1">
          <table:table-cell office:value-type="float" office:value="1308837569500" calcext:value-type="float">
            <text:p>1308837569500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office:value-type="float" office:value="1308837658500" calcext:value-type="float">
            <text:p>13088376585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37572500" calcext:value-type="float">
            <text:p>1308837572500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office:value-type="float" office:value="1308837662000" calcext:value-type="float">
            <text:p>1308837662000</text:p>
          </table:table-cell>
          <table:table-cell office:value-type="float" office:value="247" calcext:value-type="float">
            <text:p>247</text:p>
          </table:table-cell>
          <table:table-cell table:number-columns-repeated="21"/>
        </table:table-row>
        <table:table-row table:style-name="ro1">
          <table:table-cell office:value-type="float" office:value="1308837587500" calcext:value-type="float">
            <text:p>1308837587500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office:value-type="float" office:value="1308837668000" calcext:value-type="float">
            <text:p>1308837668000</text:p>
          </table:table-cell>
          <table:table-cell office:value-type="float" office:value="219" calcext:value-type="float">
            <text:p>219</text:p>
          </table:table-cell>
          <table:table-cell table:number-columns-repeated="21"/>
        </table:table-row>
        <table:table-row table:style-name="ro1">
          <table:table-cell office:value-type="float" office:value="1308837590000" calcext:value-type="float">
            <text:p>1308837590000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office:value-type="float" office:value="1308837676500" calcext:value-type="float">
            <text:p>1308837676500</text:p>
          </table:table-cell>
          <table:table-cell office:value-type="float" office:value="211" calcext:value-type="float">
            <text:p>211</text:p>
          </table:table-cell>
          <table:table-cell table:number-columns-repeated="21"/>
        </table:table-row>
        <table:table-row table:style-name="ro1">
          <table:table-cell office:value-type="float" office:value="1308837593000" calcext:value-type="float">
            <text:p>1308837593000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office:value-type="float" office:value="1308837722500" calcext:value-type="float">
            <text:p>1308837722500</text:p>
          </table:table-cell>
          <table:table-cell office:value-type="float" office:value="216" calcext:value-type="float">
            <text:p>216</text:p>
          </table:table-cell>
          <table:table-cell table:number-columns-repeated="21"/>
        </table:table-row>
        <table:table-row table:style-name="ro1">
          <table:table-cell office:value-type="float" office:value="1308837658500" calcext:value-type="float">
            <text:p>1308837658500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office:value-type="float" office:value="1308837725500" calcext:value-type="float">
            <text:p>1308837725500</text:p>
          </table:table-cell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1308837662000" calcext:value-type="float">
            <text:p>1308837662000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float" office:value="1308837728000" calcext:value-type="float">
            <text:p>13088377280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7665000" calcext:value-type="float">
            <text:p>130883766500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1308837737000" calcext:value-type="float">
            <text:p>13088377370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7671000" calcext:value-type="float">
            <text:p>130883767100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1308837739500" calcext:value-type="float">
            <text:p>1308837739500</text:p>
          </table:table-cell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1308837676500" calcext:value-type="float">
            <text:p>1308837676500</text:p>
          </table:table-cell>
          <table:table-cell office:value-type="float" office:value="220" calcext:value-type="float">
            <text:p>220</text:p>
          </table:table-cell>
          <table:table-cell table:number-columns-repeated="8"/>
          <table:table-cell office:value-type="float" office:value="1308837746000" calcext:value-type="float">
            <text:p>1308837746000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08837683000" calcext:value-type="float">
            <text:p>1308837683000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table-cell office:value-type="float" office:value="1308837746500" calcext:value-type="float">
            <text:p>13088377465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7722500" calcext:value-type="float">
            <text:p>1308837722500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1308837748500" calcext:value-type="float">
            <text:p>1308837748500</text:p>
          </table:table-cell>
          <table:table-cell office:value-type="float" office:value="230" calcext:value-type="float">
            <text:p>230</text:p>
          </table:table-cell>
          <table:table-cell table:number-columns-repeated="21"/>
        </table:table-row>
        <table:table-row table:style-name="ro1">
          <table:table-cell office:value-type="float" office:value="1308837725500" calcext:value-type="float">
            <text:p>1308837725500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1308837752500" calcext:value-type="float">
            <text:p>13088377525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7728000" calcext:value-type="float">
            <text:p>1308837728000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1308837767000" calcext:value-type="float">
            <text:p>1308837767000</text:p>
          </table:table-cell>
          <table:table-cell office:value-type="float" office:value="228" calcext:value-type="float">
            <text:p>228</text:p>
          </table:table-cell>
          <table:table-cell table:number-columns-repeated="21"/>
        </table:table-row>
        <table:table-row table:style-name="ro1">
          <table:table-cell office:value-type="float" office:value="1308837736500" calcext:value-type="float">
            <text:p>1308837736500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1308837770500" calcext:value-type="float">
            <text:p>1308837770500</text:p>
          </table:table-cell>
          <table:table-cell office:value-type="float" office:value="239" calcext:value-type="float">
            <text:p>239</text:p>
          </table:table-cell>
          <table:table-cell table:number-columns-repeated="21"/>
        </table:table-row>
        <table:table-row table:style-name="ro1">
          <table:table-cell office:value-type="float" office:value="1308837743500" calcext:value-type="float">
            <text:p>130883774350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1308837772500" calcext:value-type="float">
            <text:p>1308837772500</text:p>
          </table:table-cell>
          <table:table-cell office:value-type="float" office:value="237" calcext:value-type="float">
            <text:p>237</text:p>
          </table:table-cell>
          <table:table-cell table:number-columns-repeated="21"/>
        </table:table-row>
        <table:table-row table:style-name="ro1">
          <table:table-cell office:value-type="float" office:value="1308837745500" calcext:value-type="float">
            <text:p>13088377455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37794000" calcext:value-type="float">
            <text:p>13088377940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7746000" calcext:value-type="float">
            <text:p>130883774600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1308837794500" calcext:value-type="float">
            <text:p>1308837794500</text:p>
          </table:table-cell>
          <table:table-cell office:value-type="float" office:value="239" calcext:value-type="float">
            <text:p>239</text:p>
          </table:table-cell>
          <table:table-cell table:number-columns-repeated="21"/>
        </table:table-row>
        <table:table-row table:style-name="ro1">
          <table:table-cell office:value-type="float" office:value="1308837752500" calcext:value-type="float">
            <text:p>1308837752500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float" office:value="1308837829500" calcext:value-type="float">
            <text:p>1308837829500</text:p>
          </table:table-cell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1308837763500" calcext:value-type="float">
            <text:p>1308837763500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float" office:value="1308837841500" calcext:value-type="float">
            <text:p>13088378415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7764000" calcext:value-type="float">
            <text:p>1308837764000</text:p>
          </table:table-cell>
          <table:table-cell office:value-type="float" office:value="230" calcext:value-type="float">
            <text:p>230</text:p>
          </table:table-cell>
          <table:table-cell table:number-columns-repeated="8"/>
          <table:table-cell office:value-type="float" office:value="1308837856500" calcext:value-type="float">
            <text:p>13088378565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7767500" calcext:value-type="float">
            <text:p>130883776750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float" office:value="1308837862500" calcext:value-type="float">
            <text:p>1308837862500</text:p>
          </table:table-cell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1308837770000" calcext:value-type="float">
            <text:p>130883777000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float" office:value="1308837880500" calcext:value-type="float">
            <text:p>13088378805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7772500" calcext:value-type="float">
            <text:p>130883777250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float" office:value="1308837883500" calcext:value-type="float">
            <text:p>1308837883500</text:p>
          </table:table-cell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1308837794500" calcext:value-type="float">
            <text:p>130883779450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float" office:value="1308837901500" calcext:value-type="float">
            <text:p>1308837901500</text:p>
          </table:table-cell>
          <table:table-cell office:value-type="float" office:value="231" calcext:value-type="float">
            <text:p>231</text:p>
          </table:table-cell>
          <table:table-cell table:number-columns-repeated="21"/>
        </table:table-row>
        <table:table-row table:style-name="ro1">
          <table:table-cell office:value-type="float" office:value="1308837797000" calcext:value-type="float">
            <text:p>13088377970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37910500" calcext:value-type="float">
            <text:p>1308837910500</text:p>
          </table:table-cell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1308837812000" calcext:value-type="float">
            <text:p>1308837812000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float" office:value="1308837913500" calcext:value-type="float">
            <text:p>13088379135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7827500" calcext:value-type="float">
            <text:p>13088378275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37931500" calcext:value-type="float">
            <text:p>1308837931500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1308837829500" calcext:value-type="float">
            <text:p>1308837829500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float" office:value="1308837944500" calcext:value-type="float">
            <text:p>1308837944500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1308837838500" calcext:value-type="float">
            <text:p>130883783850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float" office:value="1308837955500" calcext:value-type="float">
            <text:p>13088379555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7848000" calcext:value-type="float">
            <text:p>13088378480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37959000" calcext:value-type="float">
            <text:p>1308837959000</text:p>
          </table:table-cell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1308837856500" calcext:value-type="float">
            <text:p>1308837856500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float" office:value="1308837964500" calcext:value-type="float">
            <text:p>1308837964500</text:p>
          </table:table-cell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float" office:value="1308837862500" calcext:value-type="float">
            <text:p>1308837862500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float" office:value="1308837964500" calcext:value-type="float">
            <text:p>1308837964500</text:p>
          </table:table-cell>
          <table:table-cell office:value-type="float" office:value="228" calcext:value-type="float">
            <text:p>228</text:p>
          </table:table-cell>
          <table:table-cell table:number-columns-repeated="21"/>
        </table:table-row>
        <table:table-row table:style-name="ro1">
          <table:table-cell office:value-type="float" office:value="1308837880500" calcext:value-type="float">
            <text:p>130883788050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float" office:value="1308837976500" calcext:value-type="float">
            <text:p>13088379765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7883500" calcext:value-type="float">
            <text:p>1308837883500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float" office:value="1308837995000" calcext:value-type="float">
            <text:p>13088379950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7898500" calcext:value-type="float">
            <text:p>1308837898500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office:value-type="float" office:value="1308838007500" calcext:value-type="float">
            <text:p>13088380075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7910500" calcext:value-type="float">
            <text:p>1308837910500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1308838018500" calcext:value-type="float">
            <text:p>13088380185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7913500" calcext:value-type="float">
            <text:p>130883791350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float" office:value="1308838025500" calcext:value-type="float">
            <text:p>1308838025500</text:p>
          </table:table-cell>
          <table:table-cell office:value-type="float" office:value="241" calcext:value-type="float">
            <text:p>241</text:p>
          </table:table-cell>
          <table:table-cell table:number-columns-repeated="21"/>
        </table:table-row>
        <table:table-row table:style-name="ro1">
          <table:table-cell office:value-type="float" office:value="1308837944500" calcext:value-type="float">
            <text:p>1308837944500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1308838027500" calcext:value-type="float">
            <text:p>1308838027500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08837955500" calcext:value-type="float">
            <text:p>1308837955500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float" office:value="1308838054500" calcext:value-type="float">
            <text:p>1308838054500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08837964500" calcext:value-type="float">
            <text:p>13088379645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38054500" calcext:value-type="float">
            <text:p>1308838054500</text:p>
          </table:table-cell>
          <table:table-cell office:value-type="float" office:value="245" calcext:value-type="float">
            <text:p>245</text:p>
          </table:table-cell>
          <table:table-cell table:number-columns-repeated="21"/>
        </table:table-row>
        <table:table-row table:style-name="ro1">
          <table:table-cell office:value-type="float" office:value="1308837964500" calcext:value-type="float">
            <text:p>1308837964500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office:value-type="float" office:value="1308838057500" calcext:value-type="float">
            <text:p>1308838057500</text:p>
          </table:table-cell>
          <table:table-cell office:value-type="float" office:value="249" calcext:value-type="float">
            <text:p>249</text:p>
          </table:table-cell>
          <table:table-cell table:number-columns-repeated="21"/>
        </table:table-row>
        <table:table-row table:style-name="ro1">
          <table:table-cell office:value-type="float" office:value="1308837992000" calcext:value-type="float">
            <text:p>130883799200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float" office:value="1308838057500" calcext:value-type="float">
            <text:p>13088380575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8007500" calcext:value-type="float">
            <text:p>130883800750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float" office:value="1308838058000" calcext:value-type="float">
            <text:p>1308838058000</text:p>
          </table:table-cell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float" office:value="1308838024500" calcext:value-type="float">
            <text:p>1308838024500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1308838058500" calcext:value-type="float">
            <text:p>1308838058500</text:p>
          </table:table-cell>
          <table:table-cell office:value-type="float" office:value="248" calcext:value-type="float">
            <text:p>248</text:p>
          </table:table-cell>
          <table:table-cell table:number-columns-repeated="21"/>
        </table:table-row>
        <table:table-row table:style-name="ro1">
          <table:table-cell office:value-type="float" office:value="1308838025500" calcext:value-type="float">
            <text:p>130883802550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1308838103000" calcext:value-type="float">
            <text:p>1308838103000</text:p>
          </table:table-cell>
          <table:table-cell office:value-type="float" office:value="246" calcext:value-type="float">
            <text:p>246</text:p>
          </table:table-cell>
          <table:table-cell table:number-columns-repeated="21"/>
        </table:table-row>
        <table:table-row table:style-name="ro1">
          <table:table-cell office:value-type="float" office:value="1308838051500" calcext:value-type="float">
            <text:p>130883805150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float" office:value="1308838106500" calcext:value-type="float">
            <text:p>1308838106500</text:p>
          </table:table-cell>
          <table:table-cell office:value-type="float" office:value="243" calcext:value-type="float">
            <text:p>243</text:p>
          </table:table-cell>
          <table:table-cell table:number-columns-repeated="21"/>
        </table:table-row>
        <table:table-row table:style-name="ro1">
          <table:table-cell office:value-type="float" office:value="1308838051500" calcext:value-type="float">
            <text:p>130883805150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float" office:value="1308838114500" calcext:value-type="float">
            <text:p>1308838114500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08838054500" calcext:value-type="float">
            <text:p>1308838054500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float" office:value="1308838115000" calcext:value-type="float">
            <text:p>13088381150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8054500" calcext:value-type="float">
            <text:p>130883805450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float" office:value="1308838123500" calcext:value-type="float">
            <text:p>1308838123500</text:p>
          </table:table-cell>
          <table:table-cell office:value-type="float" office:value="239" calcext:value-type="float">
            <text:p>239</text:p>
          </table:table-cell>
          <table:table-cell table:number-columns-repeated="21"/>
        </table:table-row>
        <table:table-row table:style-name="ro1">
          <table:table-cell office:value-type="float" office:value="1308838055000" calcext:value-type="float">
            <text:p>130883805500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1308838132500" calcext:value-type="float">
            <text:p>1308838132500</text:p>
          </table:table-cell>
          <table:table-cell office:value-type="float" office:value="248" calcext:value-type="float">
            <text:p>248</text:p>
          </table:table-cell>
          <table:table-cell table:number-columns-repeated="21"/>
        </table:table-row>
        <table:table-row table:style-name="ro1">
          <table:table-cell office:value-type="float" office:value="1308838058500" calcext:value-type="float">
            <text:p>1308838058500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float" office:value="1308838141500" calcext:value-type="float">
            <text:p>1308838141500</text:p>
          </table:table-cell>
          <table:table-cell office:value-type="float" office:value="230" calcext:value-type="float">
            <text:p>230</text:p>
          </table:table-cell>
          <table:table-cell table:number-columns-repeated="21"/>
        </table:table-row>
        <table:table-row table:style-name="ro1">
          <table:table-cell office:value-type="float" office:value="1308838082500" calcext:value-type="float">
            <text:p>13088380825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38147500" calcext:value-type="float">
            <text:p>1308838147500</text:p>
          </table:table-cell>
          <table:table-cell office:value-type="float" office:value="243" calcext:value-type="float">
            <text:p>243</text:p>
          </table:table-cell>
          <table:table-cell table:number-columns-repeated="21"/>
        </table:table-row>
        <table:table-row table:style-name="ro1">
          <table:table-cell office:value-type="float" office:value="1308838096500" calcext:value-type="float">
            <text:p>1308838096500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float" office:value="1308838169500" calcext:value-type="float">
            <text:p>1308838169500</text:p>
          </table:table-cell>
          <table:table-cell office:value-type="float" office:value="250" calcext:value-type="float">
            <text:p>250</text:p>
          </table:table-cell>
          <table:table-cell table:number-columns-repeated="21"/>
        </table:table-row>
        <table:table-row table:style-name="ro1">
          <table:table-cell office:value-type="float" office:value="1308838103000" calcext:value-type="float">
            <text:p>1308838103000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float" office:value="1308838172500" calcext:value-type="float">
            <text:p>1308838172500</text:p>
          </table:table-cell>
          <table:table-cell office:value-type="float" office:value="241" calcext:value-type="float">
            <text:p>241</text:p>
          </table:table-cell>
          <table:table-cell table:number-columns-repeated="21"/>
        </table:table-row>
        <table:table-row table:style-name="ro1">
          <table:table-cell office:value-type="float" office:value="1308838106500" calcext:value-type="float">
            <text:p>1308838106500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1308838174500" calcext:value-type="float">
            <text:p>1308838174500</text:p>
          </table:table-cell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1308838112000" calcext:value-type="float">
            <text:p>130883811200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float" office:value="1308838192500" calcext:value-type="float">
            <text:p>1308838192500</text:p>
          </table:table-cell>
          <table:table-cell office:value-type="float" office:value="248" calcext:value-type="float">
            <text:p>248</text:p>
          </table:table-cell>
          <table:table-cell table:number-columns-repeated="21"/>
        </table:table-row>
        <table:table-row table:style-name="ro1">
          <table:table-cell office:value-type="float" office:value="1308838114500" calcext:value-type="float">
            <text:p>1308838114500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1308838192500" calcext:value-type="float">
            <text:p>1308838192500</text:p>
          </table:table-cell>
          <table:table-cell office:value-type="float" office:value="246" calcext:value-type="float">
            <text:p>246</text:p>
          </table:table-cell>
          <table:table-cell table:number-columns-repeated="21"/>
        </table:table-row>
        <table:table-row table:style-name="ro1">
          <table:table-cell office:value-type="float" office:value="1308838115000" calcext:value-type="float">
            <text:p>1308838115000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float" office:value="1308838201500" calcext:value-type="float">
            <text:p>13088382015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8123500" calcext:value-type="float">
            <text:p>130883812350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float" office:value="1308838205000" calcext:value-type="float">
            <text:p>1308838205000</text:p>
          </table:table-cell>
          <table:table-cell office:value-type="float" office:value="245" calcext:value-type="float">
            <text:p>245</text:p>
          </table:table-cell>
          <table:table-cell table:number-columns-repeated="21"/>
        </table:table-row>
        <table:table-row table:style-name="ro1">
          <table:table-cell office:value-type="float" office:value="1308838129500" calcext:value-type="float">
            <text:p>1308838129500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float" office:value="1308838217000" calcext:value-type="float">
            <text:p>1308838217000</text:p>
          </table:table-cell>
          <table:table-cell office:value-type="float" office:value="243" calcext:value-type="float">
            <text:p>243</text:p>
          </table:table-cell>
          <table:table-cell table:number-columns-repeated="21"/>
        </table:table-row>
        <table:table-row table:style-name="ro1">
          <table:table-cell office:value-type="float" office:value="1308838138500" calcext:value-type="float">
            <text:p>130883813850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float" office:value="1308838234500" calcext:value-type="float">
            <text:p>1308838234500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08838147500" calcext:value-type="float">
            <text:p>1308838147500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1308838240500" calcext:value-type="float">
            <text:p>1308838240500</text:p>
          </table:table-cell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1308838148000" calcext:value-type="float">
            <text:p>1308838148000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float" office:value="1308838246500" calcext:value-type="float">
            <text:p>1308838246500</text:p>
          </table:table-cell>
          <table:table-cell office:value-type="float" office:value="246" calcext:value-type="float">
            <text:p>246</text:p>
          </table:table-cell>
          <table:table-cell table:number-columns-repeated="21"/>
        </table:table-row>
        <table:table-row table:style-name="ro1">
          <table:table-cell office:value-type="float" office:value="1308838169500" calcext:value-type="float">
            <text:p>130883816950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float" office:value="1308838253500" calcext:value-type="float">
            <text:p>1308838253500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08838169500" calcext:value-type="float">
            <text:p>130883816950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float" office:value="1308838268500" calcext:value-type="float">
            <text:p>1308838268500</text:p>
          </table:table-cell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float" office:value="1308838174500" calcext:value-type="float">
            <text:p>130883817450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1308838271500" calcext:value-type="float">
            <text:p>1308838271500</text:p>
          </table:table-cell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1308838189500" calcext:value-type="float">
            <text:p>1308838189500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float" office:value="1308838294500" calcext:value-type="float">
            <text:p>1308838294500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08838192500" calcext:value-type="float">
            <text:p>1308838192500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float" office:value="1308838301000" calcext:value-type="float">
            <text:p>1308838301000</text:p>
          </table:table-cell>
          <table:table-cell office:value-type="float" office:value="243" calcext:value-type="float">
            <text:p>243</text:p>
          </table:table-cell>
          <table:table-cell table:number-columns-repeated="21"/>
        </table:table-row>
        <table:table-row table:style-name="ro1">
          <table:table-cell office:value-type="float" office:value="1308838201500" calcext:value-type="float">
            <text:p>130883820150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1308838307000" calcext:value-type="float">
            <text:p>1308838307000</text:p>
          </table:table-cell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1308838205000" calcext:value-type="float">
            <text:p>1308838205000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1308838325000" calcext:value-type="float">
            <text:p>1308838325000</text:p>
          </table:table-cell>
          <table:table-cell office:value-type="float" office:value="247" calcext:value-type="float">
            <text:p>247</text:p>
          </table:table-cell>
          <table:table-cell table:number-columns-repeated="21"/>
        </table:table-row>
        <table:table-row table:style-name="ro1">
          <table:table-cell office:value-type="float" office:value="1308838217000" calcext:value-type="float">
            <text:p>130883821700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1308838334500" calcext:value-type="float">
            <text:p>1308838334500</text:p>
          </table:table-cell>
          <table:table-cell office:value-type="float" office:value="242" calcext:value-type="float">
            <text:p>242</text:p>
          </table:table-cell>
          <table:table-cell table:number-columns-repeated="21"/>
        </table:table-row>
        <table:table-row table:style-name="ro1">
          <table:table-cell office:value-type="float" office:value="1308838220000" calcext:value-type="float">
            <text:p>1308838220000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float" office:value="1308838337000" calcext:value-type="float">
            <text:p>1308838337000</text:p>
          </table:table-cell>
          <table:table-cell office:value-type="float" office:value="247" calcext:value-type="float">
            <text:p>247</text:p>
          </table:table-cell>
          <table:table-cell table:number-columns-repeated="21"/>
        </table:table-row>
        <table:table-row table:style-name="ro1">
          <table:table-cell office:value-type="float" office:value="1308838234500" calcext:value-type="float">
            <text:p>1308838234500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float" office:value="1308838394000" calcext:value-type="float">
            <text:p>1308838394000</text:p>
          </table:table-cell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1308838240500" calcext:value-type="float">
            <text:p>130883824050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float" office:value="1308838394500" calcext:value-type="float">
            <text:p>1308838394500</text:p>
          </table:table-cell>
          <table:table-cell office:value-type="float" office:value="245" calcext:value-type="float">
            <text:p>245</text:p>
          </table:table-cell>
          <table:table-cell table:number-columns-repeated="21"/>
        </table:table-row>
        <table:table-row table:style-name="ro1">
          <table:table-cell office:value-type="float" office:value="1308838246500" calcext:value-type="float">
            <text:p>130883824650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1308838397000" calcext:value-type="float">
            <text:p>1308838397000</text:p>
          </table:table-cell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1308838253500" calcext:value-type="float">
            <text:p>1308838253500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1308838403000" calcext:value-type="float">
            <text:p>1308838403000</text:p>
          </table:table-cell>
          <table:table-cell office:value-type="float" office:value="246" calcext:value-type="float">
            <text:p>246</text:p>
          </table:table-cell>
          <table:table-cell table:number-columns-repeated="21"/>
        </table:table-row>
        <table:table-row table:style-name="ro1">
          <table:table-cell office:value-type="float" office:value="1308838268500" calcext:value-type="float">
            <text:p>13088382685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38411500" calcext:value-type="float">
            <text:p>1308838411500</text:p>
          </table:table-cell>
          <table:table-cell office:value-type="float" office:value="250" calcext:value-type="float">
            <text:p>250</text:p>
          </table:table-cell>
          <table:table-cell table:number-columns-repeated="21"/>
        </table:table-row>
        <table:table-row table:style-name="ro1">
          <table:table-cell office:value-type="float" office:value="1308838268500" calcext:value-type="float">
            <text:p>1308838268500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float" office:value="1308838412000" calcext:value-type="float">
            <text:p>1308838412000</text:p>
          </table:table-cell>
          <table:table-cell office:value-type="float" office:value="247" calcext:value-type="float">
            <text:p>247</text:p>
          </table:table-cell>
          <table:table-cell table:number-columns-repeated="21"/>
        </table:table-row>
        <table:table-row table:style-name="ro1">
          <table:table-cell office:value-type="float" office:value="1308838294500" calcext:value-type="float">
            <text:p>130883829450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1308838421500" calcext:value-type="float">
            <text:p>13088384215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8301000" calcext:value-type="float">
            <text:p>130883830100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float" office:value="1308838424000" calcext:value-type="float">
            <text:p>1308838424000</text:p>
          </table:table-cell>
          <table:table-cell office:value-type="float" office:value="245" calcext:value-type="float">
            <text:p>245</text:p>
          </table:table-cell>
          <table:table-cell table:number-columns-repeated="21"/>
        </table:table-row>
        <table:table-row table:style-name="ro1">
          <table:table-cell office:value-type="float" office:value="1308838307000" calcext:value-type="float">
            <text:p>130883830700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float" office:value="1308838444500" calcext:value-type="float">
            <text:p>1308838444500</text:p>
          </table:table-cell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1308838322500" calcext:value-type="float">
            <text:p>130883832250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float" office:value="1308838447500" calcext:value-type="float">
            <text:p>1308838447500</text:p>
          </table:table-cell>
          <table:table-cell office:value-type="float" office:value="252" calcext:value-type="float">
            <text:p>252</text:p>
          </table:table-cell>
          <table:table-cell table:number-columns-repeated="21"/>
        </table:table-row>
        <table:table-row table:style-name="ro1">
          <table:table-cell office:value-type="float" office:value="1308838331500" calcext:value-type="float">
            <text:p>1308838331500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office:value-type="float" office:value="1308838456500" calcext:value-type="float">
            <text:p>1308838456500</text:p>
          </table:table-cell>
          <table:table-cell office:value-type="float" office:value="252" calcext:value-type="float">
            <text:p>252</text:p>
          </table:table-cell>
          <table:table-cell table:number-columns-repeated="21"/>
        </table:table-row>
        <table:table-row table:style-name="ro1">
          <table:table-cell office:value-type="float" office:value="1308838334000" calcext:value-type="float">
            <text:p>1308838334000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office:value-type="float" office:value="1308838479000" calcext:value-type="float">
            <text:p>1308838479000</text:p>
          </table:table-cell>
          <table:table-cell office:value-type="float" office:value="255" calcext:value-type="float">
            <text:p>255</text:p>
          </table:table-cell>
          <table:table-cell table:number-columns-repeated="21"/>
        </table:table-row>
        <table:table-row table:style-name="ro1">
          <table:table-cell office:value-type="float" office:value="1308838352000" calcext:value-type="float">
            <text:p>1308838352000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1308838513500" calcext:value-type="float">
            <text:p>1308838513500</text:p>
          </table:table-cell>
          <table:table-cell office:value-type="float" office:value="257" calcext:value-type="float">
            <text:p>257</text:p>
          </table:table-cell>
          <table:table-cell table:number-columns-repeated="21"/>
        </table:table-row>
        <table:table-row table:style-name="ro1">
          <table:table-cell office:value-type="float" office:value="1308838391500" calcext:value-type="float">
            <text:p>130883839150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1308838535000" calcext:value-type="float">
            <text:p>1308838535000</text:p>
          </table:table-cell>
          <table:table-cell office:value-type="float" office:value="251" calcext:value-type="float">
            <text:p>251</text:p>
          </table:table-cell>
          <table:table-cell table:number-columns-repeated="21"/>
        </table:table-row>
        <table:table-row table:style-name="ro1">
          <table:table-cell office:value-type="float" office:value="1308838406000" calcext:value-type="float">
            <text:p>1308838406000</text:p>
          </table:table-cell>
          <table:table-cell office:value-type="float" office:value="246" calcext:value-type="float">
            <text:p>246</text:p>
          </table:table-cell>
          <table:table-cell table:number-columns-repeated="8"/>
          <table:table-cell office:value-type="float" office:value="1308838546500" calcext:value-type="float">
            <text:p>1308838546500</text:p>
          </table:table-cell>
          <table:table-cell office:value-type="float" office:value="257" calcext:value-type="float">
            <text:p>257</text:p>
          </table:table-cell>
          <table:table-cell table:number-columns-repeated="21"/>
        </table:table-row>
        <table:table-row table:style-name="ro1">
          <table:table-cell office:value-type="float" office:value="1308838409000" calcext:value-type="float">
            <text:p>1308838409000</text:p>
          </table:table-cell>
          <table:table-cell office:value-type="float" office:value="256" calcext:value-type="float">
            <text:p>256</text:p>
          </table:table-cell>
          <table:table-cell table:number-columns-repeated="8"/>
          <table:table-cell office:value-type="float" office:value="1308838552500" calcext:value-type="float">
            <text:p>1308838552500</text:p>
          </table:table-cell>
          <table:table-cell office:value-type="float" office:value="242" calcext:value-type="float">
            <text:p>242</text:p>
          </table:table-cell>
          <table:table-cell table:number-columns-repeated="21"/>
        </table:table-row>
        <table:table-row table:style-name="ro1">
          <table:table-cell office:value-type="float" office:value="1308838411500" calcext:value-type="float">
            <text:p>1308838411500</text:p>
          </table:table-cell>
          <table:table-cell office:value-type="float" office:value="249" calcext:value-type="float">
            <text:p>249</text:p>
          </table:table-cell>
          <table:table-cell table:number-columns-repeated="8"/>
          <table:table-cell office:value-type="float" office:value="1308838562500" calcext:value-type="float">
            <text:p>1308838562500</text:p>
          </table:table-cell>
          <table:table-cell office:value-type="float" office:value="248" calcext:value-type="float">
            <text:p>248</text:p>
          </table:table-cell>
          <table:table-cell table:number-columns-repeated="21"/>
        </table:table-row>
        <table:table-row table:style-name="ro1">
          <table:table-cell office:value-type="float" office:value="1308838412000" calcext:value-type="float">
            <text:p>130883841200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float" office:value="1308838574500" calcext:value-type="float">
            <text:p>1308838574500</text:p>
          </table:table-cell>
          <table:table-cell office:value-type="float" office:value="257" calcext:value-type="float">
            <text:p>257</text:p>
          </table:table-cell>
          <table:table-cell table:number-columns-repeated="21"/>
        </table:table-row>
        <table:table-row table:style-name="ro1">
          <table:table-cell office:value-type="float" office:value="1308838418500" calcext:value-type="float">
            <text:p>1308838418500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float" office:value="1308838598000" calcext:value-type="float">
            <text:p>1308838598000</text:p>
          </table:table-cell>
          <table:table-cell office:value-type="float" office:value="253" calcext:value-type="float">
            <text:p>253</text:p>
          </table:table-cell>
          <table:table-cell table:number-columns-repeated="21"/>
        </table:table-row>
        <table:table-row table:style-name="ro1">
          <table:table-cell office:value-type="float" office:value="1308838427000" calcext:value-type="float">
            <text:p>1308838427000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office:value-type="float" office:value="1308838610500" calcext:value-type="float">
            <text:p>13088386105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8436500" calcext:value-type="float">
            <text:p>1308838436500</text:p>
          </table:table-cell>
          <table:table-cell office:value-type="float" office:value="261" calcext:value-type="float">
            <text:p>261</text:p>
          </table:table-cell>
          <table:table-cell table:number-columns-repeated="8"/>
          <table:table-cell office:value-type="float" office:value="1308838664500" calcext:value-type="float">
            <text:p>1308838664500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08838444500" calcext:value-type="float">
            <text:p>1308838444500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float" office:value="1308838679000" calcext:value-type="float">
            <text:p>1308838679000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08838447500" calcext:value-type="float">
            <text:p>130883844750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float" office:value="1308838687500" calcext:value-type="float">
            <text:p>1308838687500</text:p>
          </table:table-cell>
          <table:table-cell office:value-type="float" office:value="251" calcext:value-type="float">
            <text:p>251</text:p>
          </table:table-cell>
          <table:table-cell table:number-columns-repeated="21"/>
        </table:table-row>
        <table:table-row table:style-name="ro1">
          <table:table-cell office:value-type="float" office:value="1308838456500" calcext:value-type="float">
            <text:p>1308838456500</text:p>
          </table:table-cell>
          <table:table-cell office:value-type="float" office:value="252" calcext:value-type="float">
            <text:p>252</text:p>
          </table:table-cell>
          <table:table-cell table:number-columns-repeated="8"/>
          <table:table-cell office:value-type="float" office:value="1308838693500" calcext:value-type="float">
            <text:p>1308838693500</text:p>
          </table:table-cell>
          <table:table-cell office:value-type="float" office:value="255" calcext:value-type="float">
            <text:p>255</text:p>
          </table:table-cell>
          <table:table-cell table:number-columns-repeated="21"/>
        </table:table-row>
        <table:table-row table:style-name="ro1">
          <table:table-cell office:value-type="float" office:value="1308838476000" calcext:value-type="float">
            <text:p>1308838476000</text:p>
          </table:table-cell>
          <table:table-cell office:value-type="float" office:value="258" calcext:value-type="float">
            <text:p>258</text:p>
          </table:table-cell>
          <table:table-cell table:number-columns-repeated="8"/>
          <table:table-cell office:value-type="float" office:value="1308838700500" calcext:value-type="float">
            <text:p>1308838700500</text:p>
          </table:table-cell>
          <table:table-cell office:value-type="float" office:value="259" calcext:value-type="float">
            <text:p>259</text:p>
          </table:table-cell>
          <table:table-cell table:number-columns-repeated="21"/>
        </table:table-row>
        <table:table-row table:style-name="ro1">
          <table:table-cell office:value-type="float" office:value="1308838535000" calcext:value-type="float">
            <text:p>1308838535000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float" office:value="1308838711500" calcext:value-type="float">
            <text:p>1308838711500</text:p>
          </table:table-cell>
          <table:table-cell office:value-type="float" office:value="247" calcext:value-type="float">
            <text:p>247</text:p>
          </table:table-cell>
          <table:table-cell table:number-columns-repeated="21"/>
        </table:table-row>
        <table:table-row table:style-name="ro1">
          <table:table-cell office:value-type="float" office:value="1308838541500" calcext:value-type="float">
            <text:p>1308838541500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1308838724000" calcext:value-type="float">
            <text:p>13088387240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8552500" calcext:value-type="float">
            <text:p>130883855250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1308838751500" calcext:value-type="float">
            <text:p>1308838751500</text:p>
          </table:table-cell>
          <table:table-cell office:value-type="float" office:value="250" calcext:value-type="float">
            <text:p>250</text:p>
          </table:table-cell>
          <table:table-cell table:number-columns-repeated="21"/>
        </table:table-row>
        <table:table-row table:style-name="ro1">
          <table:table-cell office:value-type="float" office:value="1308838553000" calcext:value-type="float">
            <text:p>1308838553000</text:p>
          </table:table-cell>
          <table:table-cell office:value-type="float" office:value="251" calcext:value-type="float">
            <text:p>251</text:p>
          </table:table-cell>
          <table:table-cell table:number-columns-repeated="8"/>
          <table:table-cell office:value-type="float" office:value="1308838786500" calcext:value-type="float">
            <text:p>1308838786500</text:p>
          </table:table-cell>
          <table:table-cell office:value-type="float" office:value="241" calcext:value-type="float">
            <text:p>241</text:p>
          </table:table-cell>
          <table:table-cell table:number-columns-repeated="21"/>
        </table:table-row>
        <table:table-row table:style-name="ro1">
          <table:table-cell office:value-type="float" office:value="1308838562500" calcext:value-type="float">
            <text:p>1308838562500</text:p>
          </table:table-cell>
          <table:table-cell office:value-type="float" office:value="247" calcext:value-type="float">
            <text:p>247</text:p>
          </table:table-cell>
          <table:table-cell table:number-columns-repeated="8"/>
          <table:table-cell office:value-type="float" office:value="1308838826000" calcext:value-type="float">
            <text:p>1308838826000</text:p>
          </table:table-cell>
          <table:table-cell office:value-type="float" office:value="252" calcext:value-type="float">
            <text:p>252</text:p>
          </table:table-cell>
          <table:table-cell table:number-columns-repeated="21"/>
        </table:table-row>
        <table:table-row table:style-name="ro1">
          <table:table-cell office:value-type="float" office:value="1308838571500" calcext:value-type="float">
            <text:p>1308838571500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float" office:value="1308838853000" calcext:value-type="float">
            <text:p>13088388530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8595000" calcext:value-type="float">
            <text:p>1308838595000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office:value-type="float" office:value="1308838868000" calcext:value-type="float">
            <text:p>1308838868000</text:p>
          </table:table-cell>
          <table:table-cell office:value-type="float" office:value="248" calcext:value-type="float">
            <text:p>248</text:p>
          </table:table-cell>
          <table:table-cell table:number-columns-repeated="21"/>
        </table:table-row>
        <table:table-row table:style-name="ro1">
          <table:table-cell office:value-type="float" office:value="1308838607500" calcext:value-type="float">
            <text:p>1308838607500</text:p>
          </table:table-cell>
          <table:table-cell office:value-type="float" office:value="236" calcext:value-type="float">
            <text:p>236</text:p>
          </table:table-cell>
          <table:table-cell table:number-columns-repeated="8"/>
          <table:table-cell office:value-type="float" office:value="1308838891500" calcext:value-type="float">
            <text:p>1308838891500</text:p>
          </table:table-cell>
          <table:table-cell office:value-type="float" office:value="245" calcext:value-type="float">
            <text:p>245</text:p>
          </table:table-cell>
          <table:table-cell table:number-columns-repeated="21"/>
        </table:table-row>
        <table:table-row table:style-name="ro1">
          <table:table-cell office:value-type="float" office:value="1308838644000" calcext:value-type="float">
            <text:p>1308838644000</text:p>
          </table:table-cell>
          <table:table-cell office:value-type="float" office:value="239" calcext:value-type="float">
            <text:p>239</text:p>
          </table:table-cell>
          <table:table-cell table:number-columns-repeated="8"/>
          <table:table-cell office:value-type="float" office:value="1308838893000" calcext:value-type="float">
            <text:p>1308838893000</text:p>
          </table:table-cell>
          <table:table-cell office:value-type="float" office:value="245" calcext:value-type="float">
            <text:p>245</text:p>
          </table:table-cell>
          <table:table-cell table:number-columns-repeated="21"/>
        </table:table-row>
        <table:table-row table:style-name="ro1">
          <table:table-cell office:value-type="float" office:value="1308838661500" calcext:value-type="float">
            <text:p>1308838661500</text:p>
          </table:table-cell>
          <table:table-cell office:value-type="float" office:value="243" calcext:value-type="float">
            <text:p>243</text:p>
          </table:table-cell>
          <table:table-cell table:number-columns-repeated="8"/>
          <table:table-cell office:value-type="float" office:value="1308838901500" calcext:value-type="float">
            <text:p>1308838901500</text:p>
          </table:table-cell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float" office:value="1308838679000" calcext:value-type="float">
            <text:p>1308838679000</text:p>
          </table:table-cell>
          <table:table-cell office:value-type="float" office:value="244" calcext:value-type="float">
            <text:p>244</text:p>
          </table:table-cell>
          <table:table-cell table:number-columns-repeated="8"/>
          <table:table-cell office:value-type="float" office:value="1308838928500" calcext:value-type="float">
            <text:p>1308838928500</text:p>
          </table:table-cell>
          <table:table-cell office:value-type="float" office:value="241" calcext:value-type="float">
            <text:p>241</text:p>
          </table:table-cell>
          <table:table-cell table:number-columns-repeated="21"/>
        </table:table-row>
        <table:table-row table:style-name="ro1">
          <table:table-cell office:value-type="float" office:value="1308838687500" calcext:value-type="float">
            <text:p>1308838687500</text:p>
          </table:table-cell>
          <table:table-cell office:value-type="float" office:value="249" calcext:value-type="float">
            <text:p>249</text:p>
          </table:table-cell>
          <table:table-cell table:number-columns-repeated="8"/>
          <table:table-cell office:value-type="float" office:value="1308838943000" calcext:value-type="float">
            <text:p>13088389430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38690500" calcext:value-type="float">
            <text:p>1308838690500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office:value-type="float" office:value="1308838949500" calcext:value-type="float">
            <text:p>1308838949500</text:p>
          </table:table-cell>
          <table:table-cell office:value-type="float" office:value="231" calcext:value-type="float">
            <text:p>231</text:p>
          </table:table-cell>
          <table:table-cell table:number-columns-repeated="21"/>
        </table:table-row>
        <table:table-row table:style-name="ro1">
          <table:table-cell office:value-type="float" office:value="1308838693500" calcext:value-type="float">
            <text:p>1308838693500</text:p>
          </table:table-cell>
          <table:table-cell office:value-type="float" office:value="255" calcext:value-type="float">
            <text:p>255</text:p>
          </table:table-cell>
          <table:table-cell table:number-columns-repeated="8"/>
          <table:table-cell office:value-type="float" office:value="1308838967000" calcext:value-type="float">
            <text:p>13088389670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38697000" calcext:value-type="float">
            <text:p>1308838697000</text:p>
          </table:table-cell>
          <table:table-cell office:value-type="float" office:value="252" calcext:value-type="float">
            <text:p>252</text:p>
          </table:table-cell>
          <table:table-cell table:number-columns-repeated="8"/>
          <table:table-cell office:value-type="float" office:value="1308838982000" calcext:value-type="float">
            <text:p>1308838982000</text:p>
          </table:table-cell>
          <table:table-cell office:value-type="float" office:value="237" calcext:value-type="float">
            <text:p>237</text:p>
          </table:table-cell>
          <table:table-cell table:number-columns-repeated="21"/>
        </table:table-row>
        <table:table-row table:style-name="ro1">
          <table:table-cell office:value-type="float" office:value="1308838700500" calcext:value-type="float">
            <text:p>1308838700500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office:value-type="float" office:value="1308838994000" calcext:value-type="float">
            <text:p>1308838994000</text:p>
          </table:table-cell>
          <table:table-cell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office:value-type="float" office:value="1308838711500" calcext:value-type="float">
            <text:p>1308838711500</text:p>
          </table:table-cell>
          <table:table-cell office:value-type="float" office:value="246" calcext:value-type="float">
            <text:p>246</text:p>
          </table:table-cell>
          <table:table-cell table:number-columns-repeated="8"/>
          <table:table-cell office:value-type="float" office:value="1308839012500" calcext:value-type="float">
            <text:p>1308839012500</text:p>
          </table:table-cell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1308838727000" calcext:value-type="float">
            <text:p>1308838727000</text:p>
          </table:table-cell>
          <table:table-cell office:value-type="float" office:value="237" calcext:value-type="float">
            <text:p>237</text:p>
          </table:table-cell>
          <table:table-cell table:number-columns-repeated="8"/>
          <table:table-cell office:value-type="float" office:value="1308839029500" calcext:value-type="float">
            <text:p>1308839029500</text:p>
          </table:table-cell>
          <table:table-cell office:value-type="float" office:value="237" calcext:value-type="float">
            <text:p>237</text:p>
          </table:table-cell>
          <table:table-cell table:number-columns-repeated="21"/>
        </table:table-row>
        <table:table-row table:style-name="ro1">
          <table:table-cell office:value-type="float" office:value="1308838751500" calcext:value-type="float">
            <text:p>1308838751500</text:p>
          </table:table-cell>
          <table:table-cell office:value-type="float" office:value="255" calcext:value-type="float">
            <text:p>255</text:p>
          </table:table-cell>
          <table:table-cell table:number-columns-repeated="8"/>
          <table:table-cell office:value-type="float" office:value="1308839045500" calcext:value-type="float">
            <text:p>1308839045500</text:p>
          </table:table-cell>
          <table:table-cell office:value-type="float" office:value="231" calcext:value-type="float">
            <text:p>231</text:p>
          </table:table-cell>
          <table:table-cell table:number-columns-repeated="21"/>
        </table:table-row>
        <table:table-row table:style-name="ro1">
          <table:table-cell office:value-type="float" office:value="1308838786500" calcext:value-type="float">
            <text:p>1308838786500</text:p>
          </table:table-cell>
          <table:table-cell office:value-type="float" office:value="239" calcext:value-type="float">
            <text:p>239</text:p>
          </table:table-cell>
          <table:table-cell table:number-columns-repeated="8"/>
          <table:table-cell office:value-type="float" office:value="1308839083500" calcext:value-type="float">
            <text:p>13088390835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8829000" calcext:value-type="float">
            <text:p>1308838829000</text:p>
          </table:table-cell>
          <table:table-cell office:value-type="float" office:value="253" calcext:value-type="float">
            <text:p>253</text:p>
          </table:table-cell>
          <table:table-cell table:number-columns-repeated="8"/>
          <table:table-cell office:value-type="float" office:value="1308839108000" calcext:value-type="float">
            <text:p>1308839108000</text:p>
          </table:table-cell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float" office:value="1308838865000" calcext:value-type="float">
            <text:p>1308838865000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office:value-type="float" office:value="1308839114000" calcext:value-type="float">
            <text:p>1308839114000</text:p>
          </table:table-cell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float" office:value="1308838888500" calcext:value-type="float">
            <text:p>1308838888500</text:p>
          </table:table-cell>
          <table:table-cell office:value-type="float" office:value="248" calcext:value-type="float">
            <text:p>248</text:p>
          </table:table-cell>
          <table:table-cell table:number-columns-repeated="8"/>
          <table:table-cell office:value-type="float" office:value="1308839128500" calcext:value-type="float">
            <text:p>1308839128500</text:p>
          </table:table-cell>
          <table:table-cell office:value-type="float" office:value="241" calcext:value-type="float">
            <text:p>241</text:p>
          </table:table-cell>
          <table:table-cell table:number-columns-repeated="21"/>
        </table:table-row>
        <table:table-row table:style-name="ro1">
          <table:table-cell office:value-type="float" office:value="1308838888500" calcext:value-type="float">
            <text:p>1308838888500</text:p>
          </table:table-cell>
          <table:table-cell office:value-type="float" office:value="246" calcext:value-type="float">
            <text:p>246</text:p>
          </table:table-cell>
          <table:table-cell table:number-columns-repeated="8"/>
          <table:table-cell office:value-type="float" office:value="1308839131500" calcext:value-type="float">
            <text:p>1308839131500</text:p>
          </table:table-cell>
          <table:table-cell office:value-type="float" office:value="237" calcext:value-type="float">
            <text:p>237</text:p>
          </table:table-cell>
          <table:table-cell table:number-columns-repeated="21"/>
        </table:table-row>
        <table:table-row table:style-name="ro1">
          <table:table-cell office:value-type="float" office:value="1308838890000" calcext:value-type="float">
            <text:p>1308838890000</text:p>
          </table:table-cell>
          <table:table-cell office:value-type="float" office:value="246" calcext:value-type="float">
            <text:p>246</text:p>
          </table:table-cell>
          <table:table-cell table:number-columns-repeated="8"/>
          <table:table-cell office:value-type="float" office:value="1308839162000" calcext:value-type="float">
            <text:p>1308839162000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1308838901500" calcext:value-type="float">
            <text:p>1308838901500</text:p>
          </table:table-cell>
          <table:table-cell office:value-type="float" office:value="230" calcext:value-type="float">
            <text:p>230</text:p>
          </table:table-cell>
          <table:table-cell table:number-columns-repeated="8"/>
          <table:table-cell office:value-type="float" office:value="1308839188500" calcext:value-type="float">
            <text:p>1308839188500</text:p>
          </table:table-cell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1308838910500" calcext:value-type="float">
            <text:p>1308838910500</text:p>
          </table:table-cell>
          <table:table-cell office:value-type="float" office:value="241" calcext:value-type="float">
            <text:p>241</text:p>
          </table:table-cell>
          <table:table-cell table:number-columns-repeated="8"/>
          <table:table-cell office:value-type="float" office:value="1308839222500" calcext:value-type="float">
            <text:p>1308839222500</text:p>
          </table:table-cell>
          <table:table-cell office:value-type="float" office:value="250" calcext:value-type="float">
            <text:p>250</text:p>
          </table:table-cell>
          <table:table-cell table:number-columns-repeated="21"/>
        </table:table-row>
        <table:table-row table:style-name="ro1">
          <table:table-cell office:value-type="float" office:value="1308838928500" calcext:value-type="float">
            <text:p>1308838928500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float" office:value="1308839240500" calcext:value-type="float">
            <text:p>1308839240500</text:p>
          </table:table-cell>
          <table:table-cell office:value-type="float" office:value="245" calcext:value-type="float">
            <text:p>245</text:p>
          </table:table-cell>
          <table:table-cell table:number-columns-repeated="21"/>
        </table:table-row>
        <table:table-row table:style-name="ro1">
          <table:table-cell office:value-type="float" office:value="1308838946500" calcext:value-type="float">
            <text:p>1308838946500</text:p>
          </table:table-cell>
          <table:table-cell office:value-type="float" office:value="234" calcext:value-type="float">
            <text:p>234</text:p>
          </table:table-cell>
          <table:table-cell table:number-columns-repeated="8"/>
          <table:table-cell office:value-type="float" office:value="1308839296500" calcext:value-type="float">
            <text:p>1308839296500</text:p>
          </table:table-cell>
          <table:table-cell office:value-type="float" office:value="242" calcext:value-type="float">
            <text:p>242</text:p>
          </table:table-cell>
          <table:table-cell table:number-columns-repeated="21"/>
        </table:table-row>
        <table:table-row table:style-name="ro1">
          <table:table-cell office:value-type="float" office:value="1308838967000" calcext:value-type="float">
            <text:p>1308838967000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office:value-type="float" office:value="1308839312000" calcext:value-type="float">
            <text:p>1308839312000</text:p>
          </table:table-cell>
          <table:table-cell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office:value-type="float" office:value="1308839045500" calcext:value-type="float">
            <text:p>1308839045500</text:p>
          </table:table-cell>
          <table:table-cell office:value-type="float" office:value="232" calcext:value-type="float">
            <text:p>232</text:p>
          </table:table-cell>
          <table:table-cell table:number-columns-repeated="8"/>
          <table:table-cell office:value-type="float" office:value="1308839315000" calcext:value-type="float">
            <text:p>1308839315000</text:p>
          </table:table-cell>
          <table:table-cell office:value-type="float" office:value="252" calcext:value-type="float">
            <text:p>252</text:p>
          </table:table-cell>
          <table:table-cell table:number-columns-repeated="21"/>
        </table:table-row>
        <table:table-row table:style-name="ro1">
          <table:table-cell office:value-type="float" office:value="1308839087000" calcext:value-type="float">
            <text:p>1308839087000</text:p>
          </table:table-cell>
          <table:table-cell office:value-type="float" office:value="231" calcext:value-type="float">
            <text:p>231</text:p>
          </table:table-cell>
          <table:table-cell table:number-columns-repeated="8"/>
          <table:table-cell office:value-type="float" office:value="1308839317500" calcext:value-type="float">
            <text:p>1308839317500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08839087500" calcext:value-type="float">
            <text:p>1308839087500</text:p>
          </table:table-cell>
          <table:table-cell office:value-type="float" office:value="232" calcext:value-type="float">
            <text:p>232</text:p>
          </table:table-cell>
          <table:table-cell table:number-columns-repeated="8"/>
          <table:table-cell office:value-type="float" office:value="1308839318500" calcext:value-type="float">
            <text:p>1308839318500</text:p>
          </table:table-cell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1308839108000" calcext:value-type="float">
            <text:p>1308839108000</text:p>
          </table:table-cell>
          <table:table-cell office:value-type="float" office:value="232" calcext:value-type="float">
            <text:p>232</text:p>
          </table:table-cell>
          <table:table-cell table:number-columns-repeated="8"/>
          <table:table-cell office:value-type="float" office:value="1308839333500" calcext:value-type="float">
            <text:p>13088393335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9114000" calcext:value-type="float">
            <text:p>1308839114000</text:p>
          </table:table-cell>
          <table:table-cell office:value-type="float" office:value="234" calcext:value-type="float">
            <text:p>234</text:p>
          </table:table-cell>
          <table:table-cell table:number-columns-repeated="8"/>
          <table:table-cell office:value-type="float" office:value="1308839335500" calcext:value-type="float">
            <text:p>1308839335500</text:p>
          </table:table-cell>
          <table:table-cell office:value-type="float" office:value="245" calcext:value-type="float">
            <text:p>245</text:p>
          </table:table-cell>
          <table:table-cell table:number-columns-repeated="21"/>
        </table:table-row>
        <table:table-row table:style-name="ro1">
          <table:table-cell office:value-type="float" office:value="1308839128500" calcext:value-type="float">
            <text:p>1308839128500</text:p>
          </table:table-cell>
          <table:table-cell office:value-type="float" office:value="237" calcext:value-type="float">
            <text:p>237</text:p>
          </table:table-cell>
          <table:table-cell table:number-columns-repeated="8"/>
          <table:table-cell office:value-type="float" office:value="1308839350500" calcext:value-type="float">
            <text:p>1308839350500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1308839128500" calcext:value-type="float">
            <text:p>1308839128500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office:value-type="float" office:value="1308839359500" calcext:value-type="float">
            <text:p>13088393595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9162000" calcext:value-type="float">
            <text:p>1308839162000</text:p>
          </table:table-cell>
          <table:table-cell office:value-type="float" office:value="237" calcext:value-type="float">
            <text:p>237</text:p>
          </table:table-cell>
          <table:table-cell table:number-columns-repeated="8"/>
          <table:table-cell office:value-type="float" office:value="1308839369000" calcext:value-type="float">
            <text:p>1308839369000</text:p>
          </table:table-cell>
          <table:table-cell office:value-type="float" office:value="251" calcext:value-type="float">
            <text:p>251</text:p>
          </table:table-cell>
          <table:table-cell table:number-columns-repeated="21"/>
        </table:table-row>
        <table:table-row table:style-name="ro1">
          <table:table-cell office:value-type="float" office:value="1308839185500" calcext:value-type="float">
            <text:p>1308839185500</text:p>
          </table:table-cell>
          <table:table-cell office:value-type="float" office:value="234" calcext:value-type="float">
            <text:p>234</text:p>
          </table:table-cell>
          <table:table-cell table:number-columns-repeated="8"/>
          <table:table-cell office:value-type="float" office:value="1308839375500" calcext:value-type="float">
            <text:p>1308839375500</text:p>
          </table:table-cell>
          <table:table-cell office:value-type="float" office:value="248" calcext:value-type="float">
            <text:p>248</text:p>
          </table:table-cell>
          <table:table-cell table:number-columns-repeated="21"/>
        </table:table-row>
        <table:table-row table:style-name="ro1">
          <table:table-cell office:value-type="float" office:value="1308839219500" calcext:value-type="float">
            <text:p>1308839219500</text:p>
          </table:table-cell>
          <table:table-cell office:value-type="float" office:value="247" calcext:value-type="float">
            <text:p>247</text:p>
          </table:table-cell>
          <table:table-cell table:number-columns-repeated="8"/>
          <table:table-cell office:value-type="float" office:value="1308839381500" calcext:value-type="float">
            <text:p>1308839381500</text:p>
          </table:table-cell>
          <table:table-cell office:value-type="float" office:value="245" calcext:value-type="float">
            <text:p>245</text:p>
          </table:table-cell>
          <table:table-cell table:number-columns-repeated="21"/>
        </table:table-row>
        <table:table-row table:style-name="ro1">
          <table:table-cell office:value-type="float" office:value="1308839240500" calcext:value-type="float">
            <text:p>1308839240500</text:p>
          </table:table-cell>
          <table:table-cell office:value-type="float" office:value="246" calcext:value-type="float">
            <text:p>246</text:p>
          </table:table-cell>
          <table:table-cell table:number-columns-repeated="8"/>
          <table:table-cell office:value-type="float" office:value="1308839389500" calcext:value-type="float">
            <text:p>1308839389500</text:p>
          </table:table-cell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1308839273000" calcext:value-type="float">
            <text:p>1308839273000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float" office:value="1308839398500" calcext:value-type="float">
            <text:p>13088393985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9296500" calcext:value-type="float">
            <text:p>1308839296500</text:p>
          </table:table-cell>
          <table:table-cell office:value-type="float" office:value="244" calcext:value-type="float">
            <text:p>244</text:p>
          </table:table-cell>
          <table:table-cell table:number-columns-repeated="8"/>
          <table:table-cell office:value-type="float" office:value="1308839404500" calcext:value-type="float">
            <text:p>1308839404500</text:p>
          </table:table-cell>
          <table:table-cell office:value-type="float" office:value="243" calcext:value-type="float">
            <text:p>243</text:p>
          </table:table-cell>
          <table:table-cell table:number-columns-repeated="21"/>
        </table:table-row>
        <table:table-row table:style-name="ro1">
          <table:table-cell office:value-type="float" office:value="1308839315000" calcext:value-type="float">
            <text:p>1308839315000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office:value-type="float" office:value="1308839408500" calcext:value-type="float">
            <text:p>13088394085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9315000" calcext:value-type="float">
            <text:p>1308839315000</text:p>
          </table:table-cell>
          <table:table-cell office:value-type="float" office:value="248" calcext:value-type="float">
            <text:p>248</text:p>
          </table:table-cell>
          <table:table-cell table:number-columns-repeated="8"/>
          <table:table-cell office:value-type="float" office:value="1308839432000" calcext:value-type="float">
            <text:p>1308839432000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1308839317500" calcext:value-type="float">
            <text:p>1308839317500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office:value-type="float" office:value="1308839441000" calcext:value-type="float">
            <text:p>1308839441000</text:p>
          </table:table-cell>
          <table:table-cell office:value-type="float" office:value="249" calcext:value-type="float">
            <text:p>249</text:p>
          </table:table-cell>
          <table:table-cell table:number-columns-repeated="21"/>
        </table:table-row>
        <table:table-row table:style-name="ro1">
          <table:table-cell office:value-type="float" office:value="1308839317500" calcext:value-type="float">
            <text:p>1308839317500</text:p>
          </table:table-cell>
          <table:table-cell office:value-type="float" office:value="231" calcext:value-type="float">
            <text:p>231</text:p>
          </table:table-cell>
          <table:table-cell table:number-columns-repeated="8"/>
          <table:table-cell office:value-type="float" office:value="1308839443500" calcext:value-type="float">
            <text:p>1308839443500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1308839333500" calcext:value-type="float">
            <text:p>1308839333500</text:p>
          </table:table-cell>
          <table:table-cell office:value-type="float" office:value="234" calcext:value-type="float">
            <text:p>234</text:p>
          </table:table-cell>
          <table:table-cell table:number-columns-repeated="8"/>
          <table:table-cell office:value-type="float" office:value="1308839468000" calcext:value-type="float">
            <text:p>1308839468000</text:p>
          </table:table-cell>
          <table:table-cell office:value-type="float" office:value="230" calcext:value-type="float">
            <text:p>230</text:p>
          </table:table-cell>
          <table:table-cell table:number-columns-repeated="21"/>
        </table:table-row>
        <table:table-row table:style-name="ro1">
          <table:table-cell office:value-type="float" office:value="1308839335500" calcext:value-type="float">
            <text:p>1308839335500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office:value-type="float" office:value="1308839497500" calcext:value-type="float">
            <text:p>1308839497500</text:p>
          </table:table-cell>
          <table:table-cell office:value-type="float" office:value="247" calcext:value-type="float">
            <text:p>247</text:p>
          </table:table-cell>
          <table:table-cell table:number-columns-repeated="21"/>
        </table:table-row>
        <table:table-row table:style-name="ro1">
          <table:table-cell office:value-type="float" office:value="1308839350500" calcext:value-type="float">
            <text:p>1308839350500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office:value-type="float" office:value="1308839498000" calcext:value-type="float">
            <text:p>1308839498000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1308839366000" calcext:value-type="float">
            <text:p>1308839366000</text:p>
          </table:table-cell>
          <table:table-cell office:value-type="float" office:value="251" calcext:value-type="float">
            <text:p>251</text:p>
          </table:table-cell>
          <table:table-cell table:number-columns-repeated="8"/>
          <table:table-cell office:value-type="float" office:value="1308839498000" calcext:value-type="float">
            <text:p>1308839498000</text:p>
          </table:table-cell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1308839375500" calcext:value-type="float">
            <text:p>1308839375500</text:p>
          </table:table-cell>
          <table:table-cell office:value-type="float" office:value="246" calcext:value-type="float">
            <text:p>246</text:p>
          </table:table-cell>
          <table:table-cell table:number-columns-repeated="8"/>
          <table:table-cell office:value-type="float" office:value="1308839512500" calcext:value-type="float">
            <text:p>1308839512500</text:p>
          </table:table-cell>
          <table:table-cell office:value-type="float" office:value="242" calcext:value-type="float">
            <text:p>242</text:p>
          </table:table-cell>
          <table:table-cell table:number-columns-repeated="21"/>
        </table:table-row>
        <table:table-row table:style-name="ro1">
          <table:table-cell office:value-type="float" office:value="1308839381500" calcext:value-type="float">
            <text:p>1308839381500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office:value-type="float" office:value="1308839519500" calcext:value-type="float">
            <text:p>13088395195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9386500" calcext:value-type="float">
            <text:p>1308839386500</text:p>
          </table:table-cell>
          <table:table-cell office:value-type="float" office:value="239" calcext:value-type="float">
            <text:p>239</text:p>
          </table:table-cell>
          <table:table-cell table:number-columns-repeated="8"/>
          <table:table-cell office:value-type="float" office:value="1308839524500" calcext:value-type="float">
            <text:p>1308839524500</text:p>
          </table:table-cell>
          <table:table-cell office:value-type="float" office:value="241" calcext:value-type="float">
            <text:p>241</text:p>
          </table:table-cell>
          <table:table-cell table:number-columns-repeated="21"/>
        </table:table-row>
        <table:table-row table:style-name="ro1">
          <table:table-cell office:value-type="float" office:value="1308839395500" calcext:value-type="float">
            <text:p>1308839395500</text:p>
          </table:table-cell>
          <table:table-cell office:value-type="float" office:value="238" calcext:value-type="float">
            <text:p>238</text:p>
          </table:table-cell>
          <table:table-cell table:number-columns-repeated="8"/>
          <table:table-cell office:value-type="float" office:value="1308839540000" calcext:value-type="float">
            <text:p>1308839540000</text:p>
          </table:table-cell>
          <table:table-cell office:value-type="float" office:value="242" calcext:value-type="float">
            <text:p>242</text:p>
          </table:table-cell>
          <table:table-cell table:number-columns-repeated="21"/>
        </table:table-row>
        <table:table-row table:style-name="ro1">
          <table:table-cell office:value-type="float" office:value="1308839404500" calcext:value-type="float">
            <text:p>1308839404500</text:p>
          </table:table-cell>
          <table:table-cell office:value-type="float" office:value="244" calcext:value-type="float">
            <text:p>244</text:p>
          </table:table-cell>
          <table:table-cell table:number-columns-repeated="8"/>
          <table:table-cell office:value-type="float" office:value="1308839557500" calcext:value-type="float">
            <text:p>1308839557500</text:p>
          </table:table-cell>
          <table:table-cell office:value-type="float" office:value="250" calcext:value-type="float">
            <text:p>250</text:p>
          </table:table-cell>
          <table:table-cell table:number-columns-repeated="21"/>
        </table:table-row>
        <table:table-row table:style-name="ro1">
          <table:table-cell office:value-type="float" office:value="1308839408500" calcext:value-type="float">
            <text:p>1308839408500</text:p>
          </table:table-cell>
          <table:table-cell office:value-type="float" office:value="233" calcext:value-type="float">
            <text:p>233</text:p>
          </table:table-cell>
          <table:table-cell table:number-columns-repeated="8"/>
          <table:table-cell office:value-type="float" office:value="1308839558000" calcext:value-type="float">
            <text:p>1308839558000</text:p>
          </table:table-cell>
          <table:table-cell office:value-type="float" office:value="248" calcext:value-type="float">
            <text:p>248</text:p>
          </table:table-cell>
          <table:table-cell table:number-columns-repeated="21"/>
        </table:table-row>
        <table:table-row table:style-name="ro1">
          <table:table-cell office:value-type="float" office:value="1308839435000" calcext:value-type="float">
            <text:p>1308839435000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office:value-type="float" office:value="1308839582000" calcext:value-type="float">
            <text:p>1308839582000</text:p>
          </table:table-cell>
          <table:table-cell office:value-type="float" office:value="248" calcext:value-type="float">
            <text:p>248</text:p>
          </table:table-cell>
          <table:table-cell table:number-columns-repeated="21"/>
        </table:table-row>
        <table:table-row table:style-name="ro1">
          <table:table-cell office:value-type="float" office:value="1308839441000" calcext:value-type="float">
            <text:p>1308839441000</text:p>
          </table:table-cell>
          <table:table-cell office:value-type="float" office:value="249" calcext:value-type="float">
            <text:p>249</text:p>
          </table:table-cell>
          <table:table-cell table:number-columns-repeated="8"/>
          <table:table-cell office:value-type="float" office:value="1308839591500" calcext:value-type="float">
            <text:p>13088395915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9443500" calcext:value-type="float">
            <text:p>1308839443500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office:value-type="float" office:value="1308839603500" calcext:value-type="float">
            <text:p>13088396035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9459000" calcext:value-type="float">
            <text:p>1308839459000</text:p>
          </table:table-cell>
          <table:table-cell office:value-type="float" office:value="246" calcext:value-type="float">
            <text:p>246</text:p>
          </table:table-cell>
          <table:table-cell table:number-columns-repeated="8"/>
          <table:table-cell office:value-type="float" office:value="1308839608500" calcext:value-type="float">
            <text:p>1308839608500</text:p>
          </table:table-cell>
          <table:table-cell office:value-type="float" office:value="242" calcext:value-type="float">
            <text:p>242</text:p>
          </table:table-cell>
          <table:table-cell table:number-columns-repeated="21"/>
        </table:table-row>
        <table:table-row table:style-name="ro1">
          <table:table-cell office:value-type="float" office:value="1308839468000" calcext:value-type="float">
            <text:p>1308839468000</text:p>
          </table:table-cell>
          <table:table-cell office:value-type="float" office:value="233" calcext:value-type="float">
            <text:p>233</text:p>
          </table:table-cell>
          <table:table-cell table:number-columns-repeated="8"/>
          <table:table-cell office:value-type="float" office:value="1308839609500" calcext:value-type="float">
            <text:p>1308839609500</text:p>
          </table:table-cell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1308839495000" calcext:value-type="float">
            <text:p>1308839495000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float" office:value="1308839624000" calcext:value-type="float">
            <text:p>1308839624000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08839497500" calcext:value-type="float">
            <text:p>1308839497500</text:p>
          </table:table-cell>
          <table:table-cell office:value-type="float" office:value="252" calcext:value-type="float">
            <text:p>252</text:p>
          </table:table-cell>
          <table:table-cell table:number-columns-repeated="8"/>
          <table:table-cell office:value-type="float" office:value="1308839657000" calcext:value-type="float">
            <text:p>1308839657000</text:p>
          </table:table-cell>
          <table:table-cell office:value-type="float" office:value="237" calcext:value-type="float">
            <text:p>237</text:p>
          </table:table-cell>
          <table:table-cell table:number-columns-repeated="21"/>
        </table:table-row>
        <table:table-row table:style-name="ro1">
          <table:table-cell office:value-type="float" office:value="1308839498000" calcext:value-type="float">
            <text:p>1308839498000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office:value-type="float" office:value="1308839659500" calcext:value-type="float">
            <text:p>1308839659500</text:p>
          </table:table-cell>
          <table:table-cell office:value-type="float" office:value="239" calcext:value-type="float">
            <text:p>239</text:p>
          </table:table-cell>
          <table:table-cell table:number-columns-repeated="21"/>
        </table:table-row>
        <table:table-row table:style-name="ro1">
          <table:table-cell office:value-type="float" office:value="1308839512500" calcext:value-type="float">
            <text:p>1308839512500</text:p>
          </table:table-cell>
          <table:table-cell office:value-type="float" office:value="244" calcext:value-type="float">
            <text:p>244</text:p>
          </table:table-cell>
          <table:table-cell table:number-columns-repeated="8"/>
          <table:table-cell office:value-type="float" office:value="1308839669500" calcext:value-type="float">
            <text:p>1308839669500</text:p>
          </table:table-cell>
          <table:table-cell office:value-type="float" office:value="243" calcext:value-type="float">
            <text:p>243</text:p>
          </table:table-cell>
          <table:table-cell table:number-columns-repeated="21"/>
        </table:table-row>
        <table:table-row table:style-name="ro1">
          <table:table-cell office:value-type="float" office:value="1308839519500" calcext:value-type="float">
            <text:p>1308839519500</text:p>
          </table:table-cell>
          <table:table-cell office:value-type="float" office:value="236" calcext:value-type="float">
            <text:p>236</text:p>
          </table:table-cell>
          <table:table-cell table:number-columns-repeated="8"/>
          <table:table-cell office:value-type="float" office:value="1308839680500" calcext:value-type="float">
            <text:p>1308839680500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08839524500" calcext:value-type="float">
            <text:p>1308839524500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float" office:value="1308839681500" calcext:value-type="float">
            <text:p>1308839681500</text:p>
          </table:table-cell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1308839537000" calcext:value-type="float">
            <text:p>1308839537000</text:p>
          </table:table-cell>
          <table:table-cell office:value-type="float" office:value="239" calcext:value-type="float">
            <text:p>239</text:p>
          </table:table-cell>
          <table:table-cell table:number-columns-repeated="8"/>
          <table:table-cell office:value-type="float" office:value="1308839687500" calcext:value-type="float">
            <text:p>1308839687500</text:p>
          </table:table-cell>
          <table:table-cell office:value-type="float" office:value="242" calcext:value-type="float">
            <text:p>242</text:p>
          </table:table-cell>
          <table:table-cell table:number-columns-repeated="21"/>
        </table:table-row>
        <table:table-row table:style-name="ro1">
          <table:table-cell office:value-type="float" office:value="1308839552000" calcext:value-type="float">
            <text:p>1308839552000</text:p>
          </table:table-cell>
          <table:table-cell office:value-type="float" office:value="237" calcext:value-type="float">
            <text:p>237</text:p>
          </table:table-cell>
          <table:table-cell table:number-columns-repeated="8"/>
          <table:table-cell office:value-type="float" office:value="1308839696500" calcext:value-type="float">
            <text:p>1308839696500</text:p>
          </table:table-cell>
          <table:table-cell office:value-type="float" office:value="247" calcext:value-type="float">
            <text:p>247</text:p>
          </table:table-cell>
          <table:table-cell table:number-columns-repeated="21"/>
        </table:table-row>
        <table:table-row table:style-name="ro1">
          <table:table-cell office:value-type="float" office:value="1308839557500" calcext:value-type="float">
            <text:p>1308839557500</text:p>
          </table:table-cell>
          <table:table-cell office:value-type="float" office:value="247" calcext:value-type="float">
            <text:p>247</text:p>
          </table:table-cell>
          <table:table-cell table:number-columns-repeated="8"/>
          <table:table-cell office:value-type="float" office:value="1308839708000" calcext:value-type="float">
            <text:p>1308839708000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1308839558000" calcext:value-type="float">
            <text:p>1308839558000</text:p>
          </table:table-cell>
          <table:table-cell office:value-type="float" office:value="248" calcext:value-type="float">
            <text:p>248</text:p>
          </table:table-cell>
          <table:table-cell table:number-columns-repeated="8"/>
          <table:table-cell office:value-type="float" office:value="1308839716500" calcext:value-type="float">
            <text:p>1308839716500</text:p>
          </table:table-cell>
          <table:table-cell office:value-type="float" office:value="228" calcext:value-type="float">
            <text:p>228</text:p>
          </table:table-cell>
          <table:table-cell table:number-columns-repeated="21"/>
        </table:table-row>
        <table:table-row table:style-name="ro1">
          <table:table-cell office:value-type="float" office:value="1308839582000" calcext:value-type="float">
            <text:p>1308839582000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float" office:value="1308839717000" calcext:value-type="float">
            <text:p>1308839717000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08839588500" calcext:value-type="float">
            <text:p>1308839588500</text:p>
          </table:table-cell>
          <table:table-cell office:value-type="float" office:value="233" calcext:value-type="float">
            <text:p>233</text:p>
          </table:table-cell>
          <table:table-cell table:number-columns-repeated="8"/>
          <table:table-cell office:value-type="float" office:value="1308839719500" calcext:value-type="float">
            <text:p>1308839719500</text:p>
          </table:table-cell>
          <table:table-cell office:value-type="float" office:value="247" calcext:value-type="float">
            <text:p>247</text:p>
          </table:table-cell>
          <table:table-cell table:number-columns-repeated="21"/>
        </table:table-row>
        <table:table-row table:style-name="ro1">
          <table:table-cell office:value-type="float" office:value="1308839600500" calcext:value-type="float">
            <text:p>1308839600500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1308839740500" calcext:value-type="float">
            <text:p>1308839740500</text:p>
          </table:table-cell>
          <table:table-cell office:value-type="float" office:value="246" calcext:value-type="float">
            <text:p>246</text:p>
          </table:table-cell>
          <table:table-cell table:number-columns-repeated="21"/>
        </table:table-row>
        <table:table-row table:style-name="ro1">
          <table:table-cell office:value-type="float" office:value="1308839605500" calcext:value-type="float">
            <text:p>130883960550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1308839740500" calcext:value-type="float">
            <text:p>1308839740500</text:p>
          </table:table-cell>
          <table:table-cell office:value-type="float" office:value="241" calcext:value-type="float">
            <text:p>241</text:p>
          </table:table-cell>
          <table:table-cell table:number-columns-repeated="21"/>
        </table:table-row>
        <table:table-row table:style-name="ro1">
          <table:table-cell office:value-type="float" office:value="1308839609500" calcext:value-type="float">
            <text:p>1308839609500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office:value-type="float" office:value="1308839753000" calcext:value-type="float">
            <text:p>1308839753000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1308839624000" calcext:value-type="float">
            <text:p>1308839624000</text:p>
          </table:table-cell>
          <table:table-cell office:value-type="float" office:value="248" calcext:value-type="float">
            <text:p>248</text:p>
          </table:table-cell>
          <table:table-cell table:number-columns-repeated="8"/>
          <table:table-cell office:value-type="float" office:value="1308839753000" calcext:value-type="float">
            <text:p>13088397530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9657000" calcext:value-type="float">
            <text:p>1308839657000</text:p>
          </table:table-cell>
          <table:table-cell office:value-type="float" office:value="236" calcext:value-type="float">
            <text:p>236</text:p>
          </table:table-cell>
          <table:table-cell table:number-columns-repeated="8"/>
          <table:table-cell office:value-type="float" office:value="1308839789500" calcext:value-type="float">
            <text:p>1308839789500</text:p>
          </table:table-cell>
          <table:table-cell office:value-type="float" office:value="243" calcext:value-type="float">
            <text:p>243</text:p>
          </table:table-cell>
          <table:table-cell table:number-columns-repeated="21"/>
        </table:table-row>
        <table:table-row table:style-name="ro1">
          <table:table-cell office:value-type="float" office:value="1308839659500" calcext:value-type="float">
            <text:p>130883965950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1308839794500" calcext:value-type="float">
            <text:p>1308839794500</text:p>
          </table:table-cell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1308839669500" calcext:value-type="float">
            <text:p>1308839669500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1308839798500" calcext:value-type="float">
            <text:p>1308839798500</text:p>
          </table:table-cell>
          <table:table-cell office:value-type="float" office:value="231" calcext:value-type="float">
            <text:p>231</text:p>
          </table:table-cell>
          <table:table-cell table:number-columns-repeated="21"/>
        </table:table-row>
        <table:table-row table:style-name="ro1">
          <table:table-cell office:value-type="float" office:value="1308839677500" calcext:value-type="float">
            <text:p>1308839677500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1308839803500" calcext:value-type="float">
            <text:p>13088398035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9681500" calcext:value-type="float">
            <text:p>1308839681500</text:p>
          </table:table-cell>
          <table:table-cell office:value-type="float" office:value="233" calcext:value-type="float">
            <text:p>233</text:p>
          </table:table-cell>
          <table:table-cell table:number-columns-repeated="8"/>
          <table:table-cell office:value-type="float" office:value="1308839810500" calcext:value-type="float">
            <text:p>1308839810500</text:p>
          </table:table-cell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float" office:value="1308839687500" calcext:value-type="float">
            <text:p>130883968750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1308839822000" calcext:value-type="float">
            <text:p>13088398220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9696500" calcext:value-type="float">
            <text:p>1308839696500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float" office:value="1308839822000" calcext:value-type="float">
            <text:p>1308839822000</text:p>
          </table:table-cell>
          <table:table-cell office:value-type="float" office:value="239" calcext:value-type="float">
            <text:p>239</text:p>
          </table:table-cell>
          <table:table-cell table:number-columns-repeated="21"/>
        </table:table-row>
        <table:table-row table:style-name="ro1">
          <table:table-cell office:value-type="float" office:value="1308839705000" calcext:value-type="float">
            <text:p>1308839705000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float" office:value="1308839824500" calcext:value-type="float">
            <text:p>1308839824500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1308839714000" calcext:value-type="float">
            <text:p>1308839714000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1308839857500" calcext:value-type="float">
            <text:p>1308839857500</text:p>
          </table:table-cell>
          <table:table-cell office:value-type="float" office:value="237" calcext:value-type="float">
            <text:p>237</text:p>
          </table:table-cell>
          <table:table-cell table:number-columns-repeated="21"/>
        </table:table-row>
        <table:table-row table:style-name="ro1">
          <table:table-cell office:value-type="float" office:value="1308839716500" calcext:value-type="float">
            <text:p>13088397165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39875500" calcext:value-type="float">
            <text:p>13088398755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9719500" calcext:value-type="float">
            <text:p>1308839719500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float" office:value="1308839887500" calcext:value-type="float">
            <text:p>1308839887500</text:p>
          </table:table-cell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float" office:value="1308839737500" calcext:value-type="float">
            <text:p>1308839737500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1308839896500" calcext:value-type="float">
            <text:p>1308839896500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1308839740500" calcext:value-type="float">
            <text:p>130883974050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1308839897500" calcext:value-type="float">
            <text:p>1308839897500</text:p>
          </table:table-cell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1308839753000" calcext:value-type="float">
            <text:p>130883975300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float" office:value="1308839899500" calcext:value-type="float">
            <text:p>13088398995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9756000" calcext:value-type="float">
            <text:p>1308839756000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float" office:value="1308839902500" calcext:value-type="float">
            <text:p>1308839902500</text:p>
          </table:table-cell>
          <table:table-cell office:value-type="float" office:value="237" calcext:value-type="float">
            <text:p>237</text:p>
          </table:table-cell>
          <table:table-cell table:number-columns-repeated="21"/>
        </table:table-row>
        <table:table-row table:style-name="ro1">
          <table:table-cell office:value-type="float" office:value="1308839771000" calcext:value-type="float">
            <text:p>13088397710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39912000" calcext:value-type="float">
            <text:p>1308839912000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1308839786500" calcext:value-type="float">
            <text:p>1308839786500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1308839924500" calcext:value-type="float">
            <text:p>1308839924500</text:p>
          </table:table-cell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float" office:value="1308839791500" calcext:value-type="float">
            <text:p>130883979150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float" office:value="1308839944500" calcext:value-type="float">
            <text:p>13088399445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9798500" calcext:value-type="float">
            <text:p>13088397985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39944500" calcext:value-type="float">
            <text:p>1308839944500</text:p>
          </table:table-cell>
          <table:table-cell office:value-type="float" office:value="231" calcext:value-type="float">
            <text:p>231</text:p>
          </table:table-cell>
          <table:table-cell table:number-columns-repeated="21"/>
        </table:table-row>
        <table:table-row table:style-name="ro1">
          <table:table-cell office:value-type="float" office:value="1308839800500" calcext:value-type="float">
            <text:p>130883980050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float" office:value="1308839960000" calcext:value-type="float">
            <text:p>1308839960000</text:p>
          </table:table-cell>
          <table:table-cell office:value-type="float" office:value="231" calcext:value-type="float">
            <text:p>231</text:p>
          </table:table-cell>
          <table:table-cell table:number-columns-repeated="21"/>
        </table:table-row>
        <table:table-row table:style-name="ro1">
          <table:table-cell office:value-type="float" office:value="1308839810500" calcext:value-type="float">
            <text:p>130883981050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float" office:value="1308839968500" calcext:value-type="float">
            <text:p>1308839968500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1308839822000" calcext:value-type="float">
            <text:p>1308839822000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1308839972000" calcext:value-type="float">
            <text:p>1308839972000</text:p>
          </table:table-cell>
          <table:table-cell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office:value-type="float" office:value="1308839822000" calcext:value-type="float">
            <text:p>130883982200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float" office:value="1308839977500" calcext:value-type="float">
            <text:p>13088399775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39824500" calcext:value-type="float">
            <text:p>1308839824500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float" office:value="1308839984500" calcext:value-type="float">
            <text:p>1308839984500</text:p>
          </table:table-cell>
          <table:table-cell office:value-type="float" office:value="239" calcext:value-type="float">
            <text:p>239</text:p>
          </table:table-cell>
          <table:table-cell table:number-columns-repeated="21"/>
        </table:table-row>
        <table:table-row table:style-name="ro1">
          <table:table-cell office:value-type="float" office:value="1308839854500" calcext:value-type="float">
            <text:p>1308839854500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office:value-type="float" office:value="1308840014500" calcext:value-type="float">
            <text:p>1308840014500</text:p>
          </table:table-cell>
          <table:table-cell office:value-type="float" office:value="239" calcext:value-type="float">
            <text:p>239</text:p>
          </table:table-cell>
          <table:table-cell table:number-columns-repeated="21"/>
        </table:table-row>
        <table:table-row table:style-name="ro1">
          <table:table-cell office:value-type="float" office:value="1308839875500" calcext:value-type="float">
            <text:p>130883987550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float" office:value="1308840055500" calcext:value-type="float">
            <text:p>1308840055500</text:p>
          </table:table-cell>
          <table:table-cell office:value-type="float" office:value="211" calcext:value-type="float">
            <text:p>211</text:p>
          </table:table-cell>
          <table:table-cell table:number-columns-repeated="21"/>
        </table:table-row>
        <table:table-row table:style-name="ro1">
          <table:table-cell office:value-type="float" office:value="1308839887500" calcext:value-type="float">
            <text:p>13088398875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40085500" calcext:value-type="float">
            <text:p>13088400855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39894500" calcext:value-type="float">
            <text:p>130883989450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1308840101500" calcext:value-type="float">
            <text:p>13088401015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9896500" calcext:value-type="float">
            <text:p>1308839896500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float" office:value="1308840116000" calcext:value-type="float">
            <text:p>13088401160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39899500" calcext:value-type="float">
            <text:p>1308839899500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float" office:value="1308840139500" calcext:value-type="float">
            <text:p>13088401395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9902500" calcext:value-type="float">
            <text:p>1308839902500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float" office:value="1308840176000" calcext:value-type="float">
            <text:p>1308840176000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1308839912000" calcext:value-type="float">
            <text:p>1308839912000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office:value-type="float" office:value="1308840194000" calcext:value-type="float">
            <text:p>1308840194000</text:p>
          </table:table-cell>
          <table:table-cell office:value-type="float" office:value="231" calcext:value-type="float">
            <text:p>231</text:p>
          </table:table-cell>
          <table:table-cell table:number-columns-repeated="21"/>
        </table:table-row>
        <table:table-row table:style-name="ro1">
          <table:table-cell office:value-type="float" office:value="1308839921500" calcext:value-type="float">
            <text:p>1308839921500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float" office:value="1308840194500" calcext:value-type="float">
            <text:p>1308840194500</text:p>
          </table:table-cell>
          <table:table-cell office:value-type="float" office:value="239" calcext:value-type="float">
            <text:p>239</text:p>
          </table:table-cell>
          <table:table-cell table:number-columns-repeated="21"/>
        </table:table-row>
        <table:table-row table:style-name="ro1">
          <table:table-cell office:value-type="float" office:value="1308839941500" calcext:value-type="float">
            <text:p>130883994150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float" office:value="1308840209500" calcext:value-type="float">
            <text:p>1308840209500</text:p>
          </table:table-cell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08839944500" calcext:value-type="float">
            <text:p>1308839944500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1308840245500" calcext:value-type="float">
            <text:p>1308840245500</text:p>
          </table:table-cell>
          <table:table-cell office:value-type="float" office:value="230" calcext:value-type="float">
            <text:p>230</text:p>
          </table:table-cell>
          <table:table-cell table:number-columns-repeated="21"/>
        </table:table-row>
        <table:table-row table:style-name="ro1">
          <table:table-cell office:value-type="float" office:value="1308839960000" calcext:value-type="float">
            <text:p>130883996000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float" office:value="1308840265500" calcext:value-type="float">
            <text:p>1308840265500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08839968500" calcext:value-type="float">
            <text:p>1308839968500</text:p>
          </table:table-cell>
          <table:table-cell office:value-type="float" office:value="232" calcext:value-type="float">
            <text:p>232</text:p>
          </table:table-cell>
          <table:table-cell table:number-columns-repeated="8"/>
          <table:table-cell office:value-type="float" office:value="1308840280500" calcext:value-type="float">
            <text:p>13088402805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9972000" calcext:value-type="float">
            <text:p>1308839972000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office:value-type="float" office:value="1308840365000" calcext:value-type="float">
            <text:p>1308840365000</text:p>
          </table:table-cell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1308839977500" calcext:value-type="float">
            <text:p>130883997750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1308840397500" calcext:value-type="float">
            <text:p>13088403975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39981500" calcext:value-type="float">
            <text:p>1308839981500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float" office:value="1308840397500" calcext:value-type="float">
            <text:p>1308840397500</text:p>
          </table:table-cell>
          <table:table-cell office:value-type="float" office:value="221" calcext:value-type="float">
            <text:p>221</text:p>
          </table:table-cell>
          <table:table-cell table:number-columns-repeated="21"/>
        </table:table-row>
        <table:table-row table:style-name="ro1">
          <table:table-cell office:value-type="float" office:value="1308839991000" calcext:value-type="float">
            <text:p>130883999100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1308840446000" calcext:value-type="float">
            <text:p>1308840446000</text:p>
          </table:table-cell>
          <table:table-cell office:value-type="float" office:value="237" calcext:value-type="float">
            <text:p>237</text:p>
          </table:table-cell>
          <table:table-cell table:number-columns-repeated="21"/>
        </table:table-row>
        <table:table-row table:style-name="ro1">
          <table:table-cell office:value-type="float" office:value="1308840011000" calcext:value-type="float">
            <text:p>130884001100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float" office:value="1308840476000" calcext:value-type="float">
            <text:p>1308840476000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08840035000" calcext:value-type="float">
            <text:p>1308840035000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1308840661500" calcext:value-type="float">
            <text:p>1308840661500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1308840052500" calcext:value-type="float">
            <text:p>1308840052500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1308840713000" calcext:value-type="float">
            <text:p>1308840713000</text:p>
          </table:table-cell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1">
          <table:table-cell office:value-type="float" office:value="1308840085500" calcext:value-type="float">
            <text:p>13088400855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308840763500" calcext:value-type="float">
            <text:p>1308840763500</text:p>
          </table:table-cell>
          <table:table-cell office:value-type="float" office:value="218" calcext:value-type="float">
            <text:p>218</text:p>
          </table:table-cell>
          <table:table-cell table:number-columns-repeated="21"/>
        </table:table-row>
        <table:table-row table:style-name="ro1">
          <table:table-cell office:value-type="float" office:value="1308840101500" calcext:value-type="float">
            <text:p>1308840101500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1308840934500" calcext:value-type="float">
            <text:p>1308840934500</text:p>
          </table:table-cell>
          <table:table-cell office:value-type="float" office:value="224" calcext:value-type="float">
            <text:p>224</text:p>
          </table:table-cell>
          <table:table-cell table:number-columns-repeated="21"/>
        </table:table-row>
        <table:table-row table:style-name="ro1">
          <table:table-cell office:value-type="float" office:value="1308840103500" calcext:value-type="float">
            <text:p>1308840103500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float" office:value="1308840941000" calcext:value-type="float">
            <text:p>1308840941000</text:p>
          </table:table-cell>
          <table:table-cell office:value-type="float" office:value="220" calcext:value-type="float">
            <text:p>220</text:p>
          </table:table-cell>
          <table:table-cell table:number-columns-repeated="21"/>
        </table:table-row>
        <table:table-row table:style-name="ro1">
          <table:table-cell office:value-type="float" office:value="1308840116000" calcext:value-type="float">
            <text:p>130884011600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float" office:value="1308841048500" calcext:value-type="float">
            <text:p>1308841048500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1308840139500" calcext:value-type="float">
            <text:p>1308840139500</text:p>
          </table:table-cell>
          <table:table-cell office:value-type="float" office:value="52" calcext:value-type="float">
            <text:p>52</text:p>
          </table:table-cell>
          <table:table-cell table:number-columns-repeated="31"/>
        </table:table-row>
        <table:table-row table:style-name="ro1">
          <table:table-cell office:value-type="float" office:value="1308840176000" calcext:value-type="float">
            <text:p>1308840176000</text:p>
          </table:table-cell>
          <table:table-cell office:value-type="float" office:value="56" calcext:value-type="float">
            <text:p>56</text:p>
          </table:table-cell>
          <table:table-cell table:number-columns-repeated="31"/>
        </table:table-row>
        <table:table-row table:style-name="ro1">
          <table:table-cell office:value-type="float" office:value="1308840176500" calcext:value-type="float">
            <text:p>1308840176500</text:p>
          </table:table-cell>
          <table:table-cell office:value-type="float" office:value="61" calcext:value-type="float">
            <text:p>61</text:p>
          </table:table-cell>
          <table:table-cell table:number-columns-repeated="31"/>
        </table:table-row>
        <table:table-row table:style-name="ro1">
          <table:table-cell office:value-type="float" office:value="1308840194000" calcext:value-type="float">
            <text:p>1308840194000</text:p>
          </table:table-cell>
          <table:table-cell office:value-type="float" office:value="50" calcext:value-type="float">
            <text:p>50</text:p>
          </table:table-cell>
          <table:table-cell table:number-columns-repeated="31"/>
        </table:table-row>
        <table:table-row table:style-name="ro1">
          <table:table-cell office:value-type="float" office:value="1308840194500" calcext:value-type="float">
            <text:p>1308840194500</text:p>
          </table:table-cell>
          <table:table-cell office:value-type="float" office:value="60" calcext:value-type="float">
            <text:p>60</text:p>
          </table:table-cell>
          <table:table-cell table:number-columns-repeated="31"/>
        </table:table-row>
        <table:table-row table:style-name="ro1">
          <table:table-cell office:value-type="float" office:value="1308840209500" calcext:value-type="float">
            <text:p>1308840209500</text:p>
          </table:table-cell>
          <table:table-cell office:value-type="float" office:value="55" calcext:value-type="float">
            <text:p>55</text:p>
          </table:table-cell>
          <table:table-cell table:number-columns-repeated="31"/>
        </table:table-row>
        <table:table-row table:style-name="ro1">
          <table:table-cell office:value-type="float" office:value="1308840245500" calcext:value-type="float">
            <text:p>1308840245500</text:p>
          </table:table-cell>
          <table:table-cell office:value-type="float" office:value="50" calcext:value-type="float">
            <text:p>50</text:p>
          </table:table-cell>
          <table:table-cell table:number-columns-repeated="31"/>
        </table:table-row>
        <table:table-row table:style-name="ro1">
          <table:table-cell office:value-type="float" office:value="1308840262500" calcext:value-type="float">
            <text:p>1308840262500</text:p>
          </table:table-cell>
          <table:table-cell office:value-type="float" office:value="55" calcext:value-type="float">
            <text:p>55</text:p>
          </table:table-cell>
          <table:table-cell table:number-columns-repeated="31"/>
        </table:table-row>
        <table:table-row table:style-name="ro1">
          <table:table-cell office:value-type="float" office:value="1308840280500" calcext:value-type="float">
            <text:p>1308840280500</text:p>
          </table:table-cell>
          <table:table-cell office:value-type="float" office:value="237" calcext:value-type="float">
            <text:p>237</text:p>
          </table:table-cell>
          <table:table-cell table:number-columns-repeated="31"/>
        </table:table-row>
        <table:table-row table:style-name="ro1">
          <table:table-cell office:value-type="float" office:value="1308840304500" calcext:value-type="float">
            <text:p>1308840304500</text:p>
          </table:table-cell>
          <table:table-cell office:value-type="float" office:value="56" calcext:value-type="float">
            <text:p>56</text:p>
          </table:table-cell>
          <table:table-cell table:number-columns-repeated="31"/>
        </table:table-row>
        <table:table-row table:style-name="ro1">
          <table:table-cell office:value-type="float" office:value="1308840325500" calcext:value-type="float">
            <text:p>1308840325500</text:p>
          </table:table-cell>
          <table:table-cell office:value-type="float" office:value="49" calcext:value-type="float">
            <text:p>49</text:p>
          </table:table-cell>
          <table:table-cell table:number-columns-repeated="31"/>
        </table:table-row>
        <table:table-row table:style-name="ro1">
          <table:table-cell office:value-type="float" office:value="1308840394500" calcext:value-type="float">
            <text:p>1308840394500</text:p>
          </table:table-cell>
          <table:table-cell office:value-type="float" office:value="51" calcext:value-type="float">
            <text:p>51</text:p>
          </table:table-cell>
          <table:table-cell table:number-columns-repeated="31"/>
        </table:table-row>
        <table:table-row table:style-name="ro1">
          <table:table-cell office:value-type="float" office:value="1308840397500" calcext:value-type="float">
            <text:p>1308840397500</text:p>
          </table:table-cell>
          <table:table-cell office:value-type="float" office:value="43" calcext:value-type="float">
            <text:p>43</text:p>
          </table:table-cell>
          <table:table-cell table:number-columns-repeated="31"/>
        </table:table-row>
        <table:table-row table:style-name="ro1">
          <table:table-cell office:value-type="float" office:value="1308840521500" calcext:value-type="float">
            <text:p>1308840521500</text:p>
          </table:table-cell>
          <table:table-cell office:value-type="float" office:value="53" calcext:value-type="float">
            <text:p>53</text:p>
          </table:table-cell>
          <table:table-cell table:number-columns-repeated="31"/>
        </table:table-row>
        <table:table-row table:style-name="ro1">
          <table:table-cell office:value-type="float" office:value="1308840682500" calcext:value-type="float">
            <text:p>1308840682500</text:p>
          </table:table-cell>
          <table:table-cell office:value-type="float" office:value="42" calcext:value-type="float">
            <text:p>42</text:p>
          </table:table-cell>
          <table:table-cell table:number-columns-repeated="31"/>
        </table:table-row>
        <table:table-row table:style-name="ro1">
          <table:table-cell office:value-type="float" office:value="1308840686000" calcext:value-type="float">
            <text:p>1308840686000</text:p>
          </table:table-cell>
          <table:table-cell office:value-type="float" office:value="237" calcext:value-type="float">
            <text:p>237</text:p>
          </table:table-cell>
          <table:table-cell table:number-columns-repeated="31"/>
        </table:table-row>
        <table:table-row table:style-name="ro1">
          <table:table-cell office:value-type="float" office:value="1308840931500" calcext:value-type="float">
            <text:p>1308840931500</text:p>
          </table:table-cell>
          <table:table-cell office:value-type="float" office:value="225" calcext:value-type="float">
            <text:p>225</text:p>
          </table:table-cell>
          <table:table-cell table:number-columns-repeated="31"/>
        </table:table-row>
        <table:table-row table:style-name="ro1">
          <table:table-cell office:value-type="float" office:value="1308840938000" calcext:value-type="float">
            <text:p>1308840938000</text:p>
          </table:table-cell>
          <table:table-cell office:value-type="float" office:value="222" calcext:value-type="float">
            <text:p>222</text:p>
          </table:table-cell>
          <table:table-cell table:number-columns-repeated="31"/>
        </table:table-row>
        <table:table-row table:style-name="ro1">
          <table:table-cell office:value-type="float" office:value="1308841045500" calcext:value-type="float">
            <text:p>1308841045500</text:p>
          </table:table-cell>
          <table:table-cell office:value-type="float" office:value="227" calcext:value-type="float">
            <text:p>227</text:p>
          </table:table-cell>
          <table:table-cell table:number-columns-repeated="31"/>
        </table:table-row>
      </table:table>
      <table:named-expressions/>
      <table:database-ranges>
        <table:database-range table:name="__Anonymous_Sheet_DB__0" table:target-range-address="Sheet1.AE2:Sheet1.AF4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7:52:29.408755211</meta:creation-date>
    <dc:date>2026-01-26T18:18:49.941367732</dc:date>
    <meta:editing-duration>PT16M8S</meta:editing-duration>
    <meta:editing-cycles>2</meta:editing-cycles>
    <meta:generator>LibreOffice/24.2.7.2$Linux_X86_64 LibreOffice_project/420$Build-2</meta:generator>
    <meta:document-statistic meta:table-count="1" meta:cell-count="1613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scatter" chart:style-name="ch1">
        <chart:legend chart:legend-position="end" svg:x="13.739cm" svg:y="4.204cm" style:legend-expansion="high" chart:style-name="ch2"/>
        <chart:plot-area chart:style-name="ch3" table:cell-range-address="Sheet1.A2:Sheet1.B371" svg:x="0.32cm" svg:y="0.18cm" svg:width="13.099cm" svg:height="8.647cm">
          <chart:coordinate-region svg:x="1.551cm" svg:y="0.38cm" svg:width="10.63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71" chart:class="chart:scatter">
            <chart:domain table:cell-range-address="Sheet1.A2:Sheet1.A371"/>
            <chart:data-point chart:repeated="3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8835099500">
                <text:p>1308835099500</text:p>
                <draw:g>
                  <svg:desc>Sheet1.A2:Sheet1.A371</svg:desc>
                </draw:g>
              </table:table-cell>
              <table:table-cell office:value-type="float" office:value="34">
                <text:p>34</text:p>
                <draw:g>
                  <svg:desc>Sheet1.B2:Sheet1.B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8835268000">
                <text:p>13088352680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8835271000">
                <text:p>13088352710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8835339500">
                <text:p>1308835339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8835364000">
                <text:p>1308835364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8835472000">
                <text:p>1308835472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8835561500">
                <text:p>13088355615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8835562500">
                <text:p>13088355625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8835583000">
                <text:p>13088355830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8835604500">
                <text:p>1308835604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8835645500">
                <text:p>13088356455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8835646000">
                <text:p>1308835646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8835648500">
                <text:p>13088356485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8835670500">
                <text:p>13088356705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8835679500">
                <text:p>1308835679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8835679500">
                <text:p>13088356795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8835682500">
                <text:p>13088356825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8835696500">
                <text:p>13088356965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8835700500">
                <text:p>1308835700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8835703500">
                <text:p>13088357035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8835708500">
                <text:p>13088357085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8835709000">
                <text:p>13088357090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8835709500">
                <text:p>13088357095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8835712000">
                <text:p>1308835712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8835712500">
                <text:p>13088357125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8835715500">
                <text:p>13088357155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8835757500">
                <text:p>1308835757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8835759500">
                <text:p>13088357595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8835769000">
                <text:p>1308835769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8835773000">
                <text:p>1308835773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08835777500">
                <text:p>13088357775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8835780500">
                <text:p>1308835780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8835787500">
                <text:p>13088357875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08835795500">
                <text:p>1308835795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8835814500">
                <text:p>13088358145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8835831500">
                <text:p>13088358315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8835832500">
                <text:p>13088358325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8835837500">
                <text:p>13088358375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08835840500">
                <text:p>13088358405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08835844000">
                <text:p>13088358440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8835877000">
                <text:p>1308835877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8835879500">
                <text:p>13088358795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8835886500">
                <text:p>1308835886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8835904500">
                <text:p>13088359045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8835930500">
                <text:p>13088359305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08835939500">
                <text:p>13088359395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8835961500">
                <text:p>1308835961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8836039500">
                <text:p>1308836039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8836068500">
                <text:p>13088360685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8836075000">
                <text:p>1308836075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8836126500">
                <text:p>1308836126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08836150000">
                <text:p>1308836150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08836167500">
                <text:p>1308836167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08836174500">
                <text:p>13088361745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08836264500">
                <text:p>13088362645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08836273500">
                <text:p>13088362735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08836285000">
                <text:p>1308836285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8836291000">
                <text:p>13088362910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08836317500">
                <text:p>13088363175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8836320500">
                <text:p>1308836320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08836362500">
                <text:p>13088363625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08836362500">
                <text:p>13088363625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8836365500">
                <text:p>13088363655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8836365500">
                <text:p>13088363655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8836396500">
                <text:p>1308836396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8836411500">
                <text:p>13088364115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08836426000">
                <text:p>1308836426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08836432500">
                <text:p>13088364325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08836443500">
                <text:p>13088364435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08836447500">
                <text:p>13088364475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08836461500">
                <text:p>1308836461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08836462500">
                <text:p>13088364625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08836471000">
                <text:p>1308836471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08836512500">
                <text:p>13088365125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08836525000">
                <text:p>1308836525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08836534500">
                <text:p>13088365345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08836582500">
                <text:p>1308836582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8836675500">
                <text:p>13088366755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8836704500">
                <text:p>1308836704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08836705500">
                <text:p>13088367055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8836714500">
                <text:p>1308836714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08836720500">
                <text:p>13088367205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08836732500">
                <text:p>13088367325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8836747500">
                <text:p>13088367475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8836753000">
                <text:p>1308836753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08836765500">
                <text:p>1308836765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08836816500">
                <text:p>13088368165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08836873500">
                <text:p>13088368735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08836916000">
                <text:p>1308836916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08836935500">
                <text:p>13088369355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08836939500">
                <text:p>1308836939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8836948000">
                <text:p>1308836948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08836971500">
                <text:p>13088369715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08836974500">
                <text:p>13088369745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08836980500">
                <text:p>1308836980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8836980500">
                <text:p>13088369805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08837005500">
                <text:p>13088370055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08837031500">
                <text:p>13088370315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8837050000">
                <text:p>13088370500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08837160500">
                <text:p>13088371605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08837211500">
                <text:p>13088372115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08837242000">
                <text:p>1308837242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08837254500">
                <text:p>13088372545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08837289500">
                <text:p>13088372895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08837298500">
                <text:p>13088372985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8837388500">
                <text:p>1308837388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08837407500">
                <text:p>13088374075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08837410000">
                <text:p>13088374100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08837410500">
                <text:p>13088374105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08837446500">
                <text:p>1308837446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08837461000">
                <text:p>13088374610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08837472500">
                <text:p>1308837472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08837493500">
                <text:p>1308837493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08837494500">
                <text:p>13088374945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8837497500">
                <text:p>13088374975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8837497500">
                <text:p>1308837497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08837502500">
                <text:p>13088375025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08837506500">
                <text:p>13088375065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08837509000">
                <text:p>13088375090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8837524000">
                <text:p>13088375240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8837527500">
                <text:p>1308837527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08837533500">
                <text:p>13088375335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08837539000">
                <text:p>1308837539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08837553500">
                <text:p>13088375535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8837553500">
                <text:p>13088375535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8837553500">
                <text:p>13088375535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08837563500">
                <text:p>13088375635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8837569500">
                <text:p>13088375695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8837572500">
                <text:p>13088375725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8837587500">
                <text:p>13088375875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8837590000">
                <text:p>13088375900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8837593000">
                <text:p>13088375930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08837658500">
                <text:p>13088376585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08837662000">
                <text:p>1308837662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08837665000">
                <text:p>1308837665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08837671000">
                <text:p>1308837671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08837676500">
                <text:p>13088376765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08837683000">
                <text:p>13088376830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8837722500">
                <text:p>13088377225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8837725500">
                <text:p>13088377255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08837728000">
                <text:p>1308837728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08837736500">
                <text:p>13088377365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08837743500">
                <text:p>13088377435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08837745500">
                <text:p>1308837745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08837746000">
                <text:p>1308837746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08837752500">
                <text:p>1308837752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08837763500">
                <text:p>13088377635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08837764000">
                <text:p>13088377640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08837767500">
                <text:p>13088377675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08837770000">
                <text:p>13088377700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08837772500">
                <text:p>1308837772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08837794500">
                <text:p>13088377945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08837797000">
                <text:p>1308837797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08837812000">
                <text:p>1308837812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08837827500">
                <text:p>1308837827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08837829500">
                <text:p>1308837829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08837838500">
                <text:p>1308837838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08837848000">
                <text:p>1308837848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08837856500">
                <text:p>1308837856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08837862500">
                <text:p>13088378625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08837880500">
                <text:p>1308837880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08837883500">
                <text:p>13088378835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08837898500">
                <text:p>13088378985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08837910500">
                <text:p>13088379105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08837913500">
                <text:p>13088379135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08837944500">
                <text:p>1308837944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08837955500">
                <text:p>13088379555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08837964500">
                <text:p>1308837964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08837964500">
                <text:p>13088379645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08837992000">
                <text:p>1308837992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08838007500">
                <text:p>13088380075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08838024500">
                <text:p>13088380245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08838025500">
                <text:p>13088380255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08838051500">
                <text:p>13088380515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08838051500">
                <text:p>13088380515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08838054500">
                <text:p>13088380545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08838054500">
                <text:p>13088380545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08838055000">
                <text:p>1308838055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08838058500">
                <text:p>13088380585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08838082500">
                <text:p>1308838082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08838096500">
                <text:p>1308838096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08838103000">
                <text:p>1308838103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08838106500">
                <text:p>1308838106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08838112000">
                <text:p>1308838112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08838114500">
                <text:p>13088381145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08838115000">
                <text:p>13088381150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08838123500">
                <text:p>13088381235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08838129500">
                <text:p>13088381295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08838138500">
                <text:p>1308838138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08838147500">
                <text:p>13088381475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08838148000">
                <text:p>1308838148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08838169500">
                <text:p>13088381695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08838169500">
                <text:p>13088381695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08838174500">
                <text:p>13088381745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08838189500">
                <text:p>1308838189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08838192500">
                <text:p>1308838192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08838201500">
                <text:p>13088382015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08838205000">
                <text:p>1308838205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08838217000">
                <text:p>1308838217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08838220000">
                <text:p>13088382200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08838234500">
                <text:p>1308838234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8838240500">
                <text:p>13088382405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8838246500">
                <text:p>13088382465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8838253500">
                <text:p>1308838253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08838268500">
                <text:p>1308838268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08838268500">
                <text:p>13088382685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08838294500">
                <text:p>13088382945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08838301000">
                <text:p>13088383010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08838307000">
                <text:p>13088383070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08838322500">
                <text:p>13088383225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08838331500">
                <text:p>1308838331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08838334000">
                <text:p>13088383340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08838352000">
                <text:p>1308838352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08838391500">
                <text:p>13088383915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08838406000">
                <text:p>13088384060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08838409000">
                <text:p>13088384090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08838411500">
                <text:p>13088384115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08838412000">
                <text:p>1308838412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08838418500">
                <text:p>13088384185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08838427000">
                <text:p>13088384270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8838436500">
                <text:p>13088384365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08838444500">
                <text:p>1308838444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08838447500">
                <text:p>13088384475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08838456500">
                <text:p>13088384565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08838476000">
                <text:p>13088384760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08838535000">
                <text:p>1308838535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08838541500">
                <text:p>13088385415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08838552500">
                <text:p>13088385525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08838553000">
                <text:p>13088385530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08838562500">
                <text:p>13088385625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08838571500">
                <text:p>13088385715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08838595000">
                <text:p>13088385950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08838607500">
                <text:p>13088386075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08838644000">
                <text:p>13088386440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08838661500">
                <text:p>13088386615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08838679000">
                <text:p>13088386790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08838687500">
                <text:p>13088386875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08838690500">
                <text:p>1308838690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08838693500">
                <text:p>13088386935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08838697000">
                <text:p>13088386970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08838700500">
                <text:p>13088387005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08838711500">
                <text:p>13088387115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08838727000">
                <text:p>13088387270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08838751500">
                <text:p>13088387515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08838786500">
                <text:p>13088387865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08838829000">
                <text:p>13088388290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08838865000">
                <text:p>13088388650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08838888500">
                <text:p>13088388885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08838888500">
                <text:p>13088388885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08838890000">
                <text:p>13088388900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08838901500">
                <text:p>13088389015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08838910500">
                <text:p>13088389105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08838928500">
                <text:p>13088389285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08838946500">
                <text:p>1308838946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08838967000">
                <text:p>1308838967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08839045500">
                <text:p>1308839045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08839087000">
                <text:p>13088390870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08839087500">
                <text:p>1308839087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08839108000">
                <text:p>13088391080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8839114000">
                <text:p>13088391140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8839128500">
                <text:p>13088391285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8839128500">
                <text:p>13088391285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08839162000">
                <text:p>13088391620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08839185500">
                <text:p>1308839185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08839219500">
                <text:p>13088392195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08839240500">
                <text:p>13088392405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08839273000">
                <text:p>13088392730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08839296500">
                <text:p>13088392965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08839315000">
                <text:p>13088393150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08839315000">
                <text:p>13088393150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08839317500">
                <text:p>1308839317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08839317500">
                <text:p>1308839317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08839333500">
                <text:p>1308839333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08839335500">
                <text:p>1308839335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08839350500">
                <text:p>13088393505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08839366000">
                <text:p>13088393660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08839375500">
                <text:p>13088393755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08839381500">
                <text:p>1308839381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08839386500">
                <text:p>13088393865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08839395500">
                <text:p>1308839395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08839404500">
                <text:p>13088394045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08839408500">
                <text:p>13088394085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08839435000">
                <text:p>13088394350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08839441000">
                <text:p>13088394410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08839443500">
                <text:p>13088394435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08839459000">
                <text:p>13088394590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08839468000">
                <text:p>13088394680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08839495000">
                <text:p>13088394950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08839497500">
                <text:p>13088394975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08839498000">
                <text:p>1308839498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08839512500">
                <text:p>13088395125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08839519500">
                <text:p>13088395195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08839524500">
                <text:p>13088395245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08839537000">
                <text:p>13088395370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08839552000">
                <text:p>13088395520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08839557500">
                <text:p>13088395575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08839558000">
                <text:p>13088395580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8839582000">
                <text:p>13088395820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8839588500">
                <text:p>13088395885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8839600500">
                <text:p>13088396005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08839605500">
                <text:p>13088396055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08839609500">
                <text:p>13088396095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08839624000">
                <text:p>13088396240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08839657000">
                <text:p>13088396570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08839659500">
                <text:p>13088396595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08839669500">
                <text:p>13088396695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08839677500">
                <text:p>13088396775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08839681500">
                <text:p>13088396815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08839687500">
                <text:p>13088396875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08839696500">
                <text:p>13088396965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08839705000">
                <text:p>1308839705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08839714000">
                <text:p>1308839714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08839716500">
                <text:p>1308839716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08839719500">
                <text:p>13088397195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08839737500">
                <text:p>1308839737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08839740500">
                <text:p>13088397405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08839753000">
                <text:p>13088397530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08839756000">
                <text:p>1308839756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08839771000">
                <text:p>1308839771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08839786500">
                <text:p>1308839786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08839791500">
                <text:p>1308839791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08839798500">
                <text:p>1308839798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08839800500">
                <text:p>1308839800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08839810500">
                <text:p>1308839810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08839822000">
                <text:p>1308839822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08839822000">
                <text:p>13088398220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08839824500">
                <text:p>13088398245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08839854500">
                <text:p>1308839854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08839875500">
                <text:p>1308839875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08839887500">
                <text:p>1308839887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8839894500">
                <text:p>13088398945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08839896500">
                <text:p>1308839896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08839899500">
                <text:p>1308839899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08839902500">
                <text:p>13088399025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08839912000">
                <text:p>1308839912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08839921500">
                <text:p>13088399215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08839941500">
                <text:p>1308839941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08839944500">
                <text:p>13088399445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08839960000">
                <text:p>1308839960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08839968500">
                <text:p>1308839968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08839972000">
                <text:p>1308839972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08839977500">
                <text:p>13088399775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08839981500">
                <text:p>1308839981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08839991000">
                <text:p>1308839991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08840011000">
                <text:p>13088400110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08840035000">
                <text:p>1308840035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08840052500">
                <text:p>1308840052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08840085500">
                <text:p>1308840085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08840101500">
                <text:p>13088401015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08840103500">
                <text:p>1308840103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08840116000">
                <text:p>13088401160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08840139500">
                <text:p>1308840139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08840176000">
                <text:p>1308840176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08840176500">
                <text:p>13088401765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08840194000">
                <text:p>1308840194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08840194500">
                <text:p>13088401945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08840209500">
                <text:p>13088402095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08840245500">
                <text:p>13088402455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08840262500">
                <text:p>13088402625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08840280500">
                <text:p>13088402805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08840304500">
                <text:p>13088403045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08840325500">
                <text:p>13088403255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08840394500">
                <text:p>1308840394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08840397500">
                <text:p>13088403975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08840521500">
                <text:p>1308840521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08840682500">
                <text:p>13088406825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08840686000">
                <text:p>13088406860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08840931500">
                <text:p>13088409315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08840938000">
                <text:p>13088409380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08841045500">
                <text:p>1308841045500</text:p>
              </table:table-cell>
              <table:table-cell office:value-type="float" office:value="227">
                <text:p>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7cm" xlink:href=".." xlink:type="simple" chart:class="chart:scatter" chart:style-name="ch1">
        <chart:legend chart:legend-position="end" svg:x="13.791cm" svg:y="4.204cm" style:legend-expansion="high" chart:style-name="ch2"/>
        <chart:plot-area chart:style-name="ch3" table:cell-range-address="Sheet1.K2:Sheet1.L352" svg:x="0.32cm" svg:y="0.18cm" svg:width="13.151cm" svg:height="8.647cm">
          <chart:coordinate-region svg:x="1.551cm" svg:y="0.38cm" svg:width="10.688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352" chart:class="chart:scatter">
            <chart:domain table:cell-range-address="Sheet1.K2:Sheet1.K352"/>
            <chart:data-point chart:repeated="3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8835102500">
                <text:p>1308835102500</text:p>
                <draw:g>
                  <svg:desc>Sheet1.K2:Sheet1.K352</svg:desc>
                </draw:g>
              </table:table-cell>
              <table:table-cell office:value-type="float" office:value="213">
                <text:p>213</text:p>
                <draw:g>
                  <svg:desc>Sheet1.L2:Sheet1.L3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8835274000">
                <text:p>13088352740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8835339500">
                <text:p>1308835339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8835472000">
                <text:p>13088354720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8835561500">
                <text:p>13088355615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8835562500">
                <text:p>13088355625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8835586000">
                <text:p>13088355860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8835607500">
                <text:p>13088356075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8835643000">
                <text:p>13088356430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8835648500">
                <text:p>13088356485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8835648500">
                <text:p>13088356485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8835673500">
                <text:p>13088356735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8835679500">
                <text:p>13088356795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8835682500">
                <text:p>13088356825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8835682500">
                <text:p>13088356825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8835699500">
                <text:p>13088356995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8835700500">
                <text:p>13088357005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8835703500">
                <text:p>13088357035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8835711500">
                <text:p>13088357115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8835712000">
                <text:p>13088357120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8835715000">
                <text:p>13088357150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8835715500">
                <text:p>13088357155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8835715500">
                <text:p>13088357155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8835757500">
                <text:p>13088357575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8835762500">
                <text:p>13088357625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8835769000">
                <text:p>13088357690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8835773000">
                <text:p>13088357730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8835780500">
                <text:p>13088357805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8835780500">
                <text:p>13088357805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8835787500">
                <text:p>13088357875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08835795500">
                <text:p>13088357955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8835814500">
                <text:p>13088358145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8835832500">
                <text:p>13088358325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08835834500">
                <text:p>1308835834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8835834500">
                <text:p>13088358345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8835840500">
                <text:p>13088358405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8835843500">
                <text:p>13088358435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8835877000">
                <text:p>13088358770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08835882500">
                <text:p>13088358825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08835886500">
                <text:p>13088358865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8835907500">
                <text:p>13088359075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8835939500">
                <text:p>13088359395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8835964500">
                <text:p>13088359645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8836042500">
                <text:p>13088360425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8836068500">
                <text:p>13088360685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08836078000">
                <text:p>13088360780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8836126500">
                <text:p>13088361265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8836170500">
                <text:p>1308836170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8836177500">
                <text:p>13088361775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8836264500">
                <text:p>13088362645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8836285000">
                <text:p>13088362850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08836294000">
                <text:p>13088362940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08836317500">
                <text:p>13088363175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08836320500">
                <text:p>13088363205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08836362500">
                <text:p>13088363625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08836365500">
                <text:p>13088363655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08836365500">
                <text:p>13088363655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8836365500">
                <text:p>13088363655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08836386500">
                <text:p>13088363865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8836396500">
                <text:p>13088363965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08836411500">
                <text:p>13088364115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08836429000">
                <text:p>13088364290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8836432500">
                <text:p>13088364325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8836443500">
                <text:p>13088364435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8836447500">
                <text:p>13088364475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8836464500">
                <text:p>13088364645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08836465500">
                <text:p>13088364655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08836471000">
                <text:p>13088364710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08836510500">
                <text:p>13088365105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08836515500">
                <text:p>13088365155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08836525000">
                <text:p>13088365250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08836534500">
                <text:p>13088365345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08836582500">
                <text:p>1308836582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08836675500">
                <text:p>13088366755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08836707500">
                <text:p>1308836707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08836708500">
                <text:p>13088367085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08836714500">
                <text:p>1308836714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8836720500">
                <text:p>13088367205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8836732500">
                <text:p>13088367325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08836747500">
                <text:p>13088367475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8836756000">
                <text:p>1308836756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08836816500">
                <text:p>13088368165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08836919000">
                <text:p>13088369190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8836935500">
                <text:p>13088369355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8836936500">
                <text:p>1308836936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08836945000">
                <text:p>13088369450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08836968500">
                <text:p>13088369685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08836971500">
                <text:p>13088369715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08836977500">
                <text:p>13088369775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08836983500">
                <text:p>13088369835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08836983500">
                <text:p>13088369835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8837004500">
                <text:p>13088370045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08837005500">
                <text:p>13088370055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08837018000">
                <text:p>13088370180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08837053000">
                <text:p>13088370530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8837163500">
                <text:p>1308837163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08837211500">
                <text:p>13088372115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08837239000">
                <text:p>13088372390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8837254500">
                <text:p>13088372545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08837289500">
                <text:p>1308837289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08837298500">
                <text:p>13088372985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08837368000">
                <text:p>13088373680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08837391500">
                <text:p>1308837391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08837407500">
                <text:p>1308837407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08837410000">
                <text:p>13088374100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8837413500">
                <text:p>1308837413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08837449500">
                <text:p>13088374495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08837461000">
                <text:p>13088374610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08837475500">
                <text:p>13088374755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08837493500">
                <text:p>13088374935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08837497500">
                <text:p>1308837497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08837497500">
                <text:p>1308837497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08837497500">
                <text:p>13088374975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08837505500">
                <text:p>13088375055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8837506500">
                <text:p>13088375065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8837509000">
                <text:p>13088375090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08837524000">
                <text:p>13088375240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08837527500">
                <text:p>13088375275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08837536500">
                <text:p>1308837536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8837539000">
                <text:p>13088375390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8837553500">
                <text:p>13088375535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08837553500">
                <text:p>13088375535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08837553500">
                <text:p>13088375535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08837569500">
                <text:p>13088375695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8837575500">
                <text:p>13088375755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8837590000">
                <text:p>13088375900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08837590500">
                <text:p>13088375905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8837658500">
                <text:p>1308837658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8837662000">
                <text:p>13088376620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8837668000">
                <text:p>13088376680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8837676500">
                <text:p>13088376765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8837722500">
                <text:p>13088377225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08837725500">
                <text:p>1308837725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08837728000">
                <text:p>13088377280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08837737000">
                <text:p>13088377370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08837739500">
                <text:p>1308837739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08837746000">
                <text:p>13088377460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08837746500">
                <text:p>1308837746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8837748500">
                <text:p>13088377485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8837752500">
                <text:p>13088377525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08837767000">
                <text:p>13088377670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08837770500">
                <text:p>13088377705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08837772500">
                <text:p>13088377725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08837794000">
                <text:p>13088377940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08837794500">
                <text:p>13088377945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08837829500">
                <text:p>1308837829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08837841500">
                <text:p>1308837841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08837856500">
                <text:p>1308837856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08837862500">
                <text:p>1308837862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08837880500">
                <text:p>1308837880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08837883500">
                <text:p>1308837883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08837901500">
                <text:p>1308837901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08837910500">
                <text:p>1308837910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08837913500">
                <text:p>1308837913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08837931500">
                <text:p>13088379315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08837944500">
                <text:p>13088379445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08837955500">
                <text:p>13088379555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08837959000">
                <text:p>13088379590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08837964500">
                <text:p>13088379645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08837964500">
                <text:p>13088379645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08837976500">
                <text:p>1308837976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08837995000">
                <text:p>13088379950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08838007500">
                <text:p>1308838007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08838018500">
                <text:p>13088380185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08838025500">
                <text:p>13088380255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08838027500">
                <text:p>13088380275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08838054500">
                <text:p>13088380545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08838054500">
                <text:p>1308838054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08838057500">
                <text:p>13088380575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08838057500">
                <text:p>1308838057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08838058000">
                <text:p>13088380580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08838058500">
                <text:p>13088380585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08838103000">
                <text:p>13088381030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08838106500">
                <text:p>13088381065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08838114500">
                <text:p>13088381145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08838115000">
                <text:p>13088381150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08838123500">
                <text:p>13088381235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08838132500">
                <text:p>13088381325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08838141500">
                <text:p>13088381415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08838147500">
                <text:p>13088381475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08838169500">
                <text:p>13088381695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08838172500">
                <text:p>13088381725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08838174500">
                <text:p>13088381745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08838192500">
                <text:p>13088381925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08838192500">
                <text:p>13088381925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08838201500">
                <text:p>1308838201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08838205000">
                <text:p>13088382050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08838217000">
                <text:p>13088382170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08838234500">
                <text:p>13088382345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08838240500">
                <text:p>13088382405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08838246500">
                <text:p>13088382465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08838253500">
                <text:p>13088382535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08838268500">
                <text:p>13088382685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08838271500">
                <text:p>1308838271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08838294500">
                <text:p>13088382945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08838301000">
                <text:p>13088383010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08838307000">
                <text:p>13088383070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08838325000">
                <text:p>13088383250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08838334500">
                <text:p>13088383345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08838337000">
                <text:p>13088383370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08838394000">
                <text:p>13088383940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8838394500">
                <text:p>1308838394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8838397000">
                <text:p>13088383970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8838403000">
                <text:p>13088384030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08838411500">
                <text:p>13088384115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08838412000">
                <text:p>13088384120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08838421500">
                <text:p>1308838421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08838424000">
                <text:p>13088384240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08838444500">
                <text:p>13088384445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08838447500">
                <text:p>13088384475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08838456500">
                <text:p>13088384565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08838479000">
                <text:p>13088384790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08838513500">
                <text:p>130883851350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08838535000">
                <text:p>13088385350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08838546500">
                <text:p>130883854650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08838552500">
                <text:p>13088385525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08838562500">
                <text:p>13088385625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08838574500">
                <text:p>130883857450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08838598000">
                <text:p>13088385980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08838610500">
                <text:p>13088386105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8838664500">
                <text:p>13088386645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08838679000">
                <text:p>13088386790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08838687500">
                <text:p>13088386875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08838693500">
                <text:p>13088386935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08838700500">
                <text:p>13088387005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08838711500">
                <text:p>13088387115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08838724000">
                <text:p>13088387240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08838751500">
                <text:p>13088387515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08838786500">
                <text:p>13088387865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08838826000">
                <text:p>13088388260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08838853000">
                <text:p>13088388530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08838868000">
                <text:p>13088388680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08838891500">
                <text:p>1308838891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08838893000">
                <text:p>13088388930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08838901500">
                <text:p>13088389015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08838928500">
                <text:p>13088389285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08838943000">
                <text:p>1308838943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08838949500">
                <text:p>1308838949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08838967000">
                <text:p>1308838967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08838982000">
                <text:p>13088389820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08838994000">
                <text:p>13088389940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08839012500">
                <text:p>13088390125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08839029500">
                <text:p>13088390295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08839045500">
                <text:p>1308839045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08839083500">
                <text:p>13088390835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08839108000">
                <text:p>13088391080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08839114000">
                <text:p>13088391140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08839128500">
                <text:p>13088391285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08839131500">
                <text:p>13088391315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08839162000">
                <text:p>13088391620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08839188500">
                <text:p>1308839188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08839222500">
                <text:p>13088392225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08839240500">
                <text:p>1308839240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08839296500">
                <text:p>13088392965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08839312000">
                <text:p>13088393120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08839315000">
                <text:p>13088393150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08839317500">
                <text:p>13088393175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08839318500">
                <text:p>13088393185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08839333500">
                <text:p>13088393335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8839335500">
                <text:p>1308839335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8839350500">
                <text:p>13088393505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8839359500">
                <text:p>1308839359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08839369000">
                <text:p>13088393690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08839375500">
                <text:p>13088393755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08839381500">
                <text:p>1308839381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08839389500">
                <text:p>13088393895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08839398500">
                <text:p>1308839398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08839404500">
                <text:p>13088394045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08839408500">
                <text:p>1308839408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08839432000">
                <text:p>13088394320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08839441000">
                <text:p>13088394410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08839443500">
                <text:p>13088394435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08839468000">
                <text:p>13088394680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08839497500">
                <text:p>13088394975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08839498000">
                <text:p>13088394980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08839498000">
                <text:p>13088394980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08839512500">
                <text:p>13088395125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08839519500">
                <text:p>1308839519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08839524500">
                <text:p>13088395245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08839540000">
                <text:p>13088395400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08839557500">
                <text:p>13088395575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08839558000">
                <text:p>13088395580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08839582000">
                <text:p>13088395820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08839591500">
                <text:p>13088395915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08839603500">
                <text:p>1308839603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08839608500">
                <text:p>13088396085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08839609500">
                <text:p>1308839609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08839624000">
                <text:p>13088396240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08839657000">
                <text:p>13088396570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08839659500">
                <text:p>13088396595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08839669500">
                <text:p>13088396695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08839680500">
                <text:p>13088396805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08839681500">
                <text:p>1308839681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08839687500">
                <text:p>13088396875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08839696500">
                <text:p>13088396965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08839708000">
                <text:p>13088397080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08839716500">
                <text:p>13088397165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8839717000">
                <text:p>13088397170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8839719500">
                <text:p>13088397195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8839740500">
                <text:p>13088397405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08839740500">
                <text:p>13088397405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08839753000">
                <text:p>13088397530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08839753000">
                <text:p>13088397530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08839789500">
                <text:p>13088397895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08839794500">
                <text:p>1308839794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08839798500">
                <text:p>1308839798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08839803500">
                <text:p>1308839803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08839810500">
                <text:p>13088398105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08839822000">
                <text:p>13088398220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08839822000">
                <text:p>13088398220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08839824500">
                <text:p>13088398245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08839857500">
                <text:p>13088398575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08839875500">
                <text:p>1308839875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08839887500">
                <text:p>13088398875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08839896500">
                <text:p>13088398965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08839897500">
                <text:p>13088398975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08839899500">
                <text:p>13088398995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08839902500">
                <text:p>13088399025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08839912000">
                <text:p>13088399120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08839924500">
                <text:p>13088399245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08839944500">
                <text:p>1308839944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08839944500">
                <text:p>1308839944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08839960000">
                <text:p>13088399600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08839968500">
                <text:p>13088399685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08839972000">
                <text:p>13088399720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08839977500">
                <text:p>1308839977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08839984500">
                <text:p>13088399845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08840014500">
                <text:p>13088400145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08840055500">
                <text:p>13088400555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08840085500">
                <text:p>1308840085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8840101500">
                <text:p>13088401015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08840116000">
                <text:p>1308840116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08840139500">
                <text:p>1308840139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08840176000">
                <text:p>13088401760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08840194000">
                <text:p>13088401940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08840194500">
                <text:p>13088401945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08840209500">
                <text:p>1308840209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08840245500">
                <text:p>13088402455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08840265500">
                <text:p>13088402655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08840280500">
                <text:p>13088402805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08840365000">
                <text:p>13088403650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08840397500">
                <text:p>13088403975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08840397500">
                <text:p>13088403975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08840446000">
                <text:p>13088404460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08840476000">
                <text:p>1308840476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08840661500">
                <text:p>13088406615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08840713000">
                <text:p>13088407130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08840763500">
                <text:p>13088407635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08840934500">
                <text:p>13088409345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08840941000">
                <text:p>13088409410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08841048500">
                <text:p>1308841048500</text:p>
              </table:table-cell>
              <table:table-cell office:value-type="float" office:value="226">
                <text:p>2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7cm" xlink:href=".." xlink:type="simple" chart:class="chart:bar" chart:style-name="ch1">
        <chart:legend chart:legend-position="end" svg:x="13.737cm" svg:y="4.204cm" style:legend-expansion="high" chart:style-name="ch2"/>
        <chart:plot-area chart:style-name="ch3" table:cell-range-address="Sheet1.V2:Sheet1.V41" svg:x="0.32cm" svg:y="0.18cm" svg:width="13.097cm" svg:height="8.647cm">
          <chart:coordinate-region svg:x="1.127cm" svg:y="0.379cm" svg:width="12.29cm" svg:height="7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2:Sheet1.V41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V2:Sheet1.V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7cm" xlink:href=".." xlink:type="simple" chart:class="chart:bar" chart:style-name="ch1">
        <chart:legend chart:legend-position="end" svg:x="13.526cm" svg:y="4.204cm" style:legend-expansion="high" chart:style-name="ch2"/>
        <chart:plot-area chart:style-name="ch3" table:cell-range-address="Sheet1.AF2:Sheet1.AF41" svg:x="0.32cm" svg:y="0.18cm" svg:width="12.886cm" svg:height="8.647cm">
          <chart:coordinate-region svg:x="1.127cm" svg:y="0.379cm" svg:width="12.079cm" svg:height="7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F2:Sheet1.AF41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F2:Sheet1.A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">
                <text:p>1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